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59" style:parent-style-name="Textbody" style:family="paragraph">
      <style:paragraph-properties fo:text-align="center"/>
    </style:style>
    <style:style style:name="P60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Textbody" style:family="paragraph">
      <style:paragraph-properties fo:text-align="start"/>
    </style:style>
    <style:style style:name="P62" style:parent-style-name="Textbody" style:family="paragraph">
      <style:paragraph-properties fo:text-align="start"/>
    </style:style>
    <style:style style:name="P63" style:parent-style-name="Textbody" style:family="paragraph">
      <style:paragraph-properties fo:text-align="start"/>
    </style:style>
    <style:style style:name="P64" style:parent-style-name="Textbody" style:family="paragraph">
      <style:paragraph-properties fo:text-align="start"/>
    </style:style>
    <style:style style:name="P65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66" style:parent-style-name="Textbody" style:family="paragraph">
      <style:paragraph-properties fo:text-align="start"/>
    </style:style>
    <style:style style:name="P67" style:parent-style-name="Textbody" style:family="paragraph">
      <style:paragraph-properties fo:text-align="start"/>
    </style:style>
    <style:style style:name="P68" style:parent-style-name="Textbody" style:family="paragraph">
      <style:paragraph-properties fo:text-align="start"/>
    </style:style>
    <style:style style:name="P69" style:parent-style-name="Textbody" style:family="paragraph">
      <style:paragraph-properties fo:text-align="start"/>
    </style:style>
    <style:style style:name="P70" style:parent-style-name="Textbody" style:family="paragraph">
      <style:paragraph-properties fo:text-align="start"/>
    </style:style>
    <style:style style:name="P71" style:parent-style-name="Textbody" style:family="paragraph">
      <style:paragraph-properties fo:text-align="start"/>
    </style:style>
    <style:style style:name="P72" style:parent-style-name="Textbody" style:family="paragraph">
      <style:paragraph-properties fo:text-align="start"/>
    </style:style>
    <style:style style:name="P73" style:parent-style-name="Textbody" style:family="paragraph">
      <style:paragraph-properties fo:text-align="start"/>
    </style:style>
    <style:style style:name="P74" style:parent-style-name="Textbody" style:family="paragraph">
      <style:paragraph-properties fo:text-align="start"/>
    </style:style>
    <style:style style:name="P75" style:parent-style-name="Textbody" style:family="paragraph">
      <style:paragraph-properties fo:text-align="start"/>
    </style:style>
    <style:style style:name="P76" style:parent-style-name="Textbody" style:family="paragraph">
      <style:paragraph-properties fo:text-align="start"/>
    </style:style>
    <style:style style:name="P77" style:parent-style-name="Textbody" style:family="paragraph">
      <style:paragraph-properties fo:text-align="start"/>
    </style:style>
    <style:style style:name="P78" style:parent-style-name="Textbody" style:family="paragraph">
      <style:paragraph-properties fo:text-align="start"/>
    </style:style>
    <style:style style:name="P79" style:parent-style-name="Textbody" style:family="paragraph">
      <style:paragraph-properties fo:text-align="start"/>
    </style:style>
    <style:style style:name="P80" style:parent-style-name="Textbody" style:family="paragraph">
      <style:paragraph-properties fo:text-align="start"/>
    </style:style>
    <style:style style:name="P81" style:parent-style-name="Textbody" style:family="paragraph">
      <style:paragraph-properties fo:text-align="start"/>
    </style:style>
    <style:style style:name="P82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83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84" style:parent-style-name="Textbody" style:family="paragraph">
      <style:paragraph-properties fo:text-align="start"/>
    </style:style>
    <style:style style:name="P85" style:parent-style-name="Textbody" style:family="paragraph">
      <style:paragraph-properties fo:text-align="start"/>
    </style:style>
    <style:style style:name="P86" style:parent-style-name="Textbody" style:family="paragraph">
      <style:paragraph-properties fo:text-align="start"/>
    </style:style>
    <style:style style:name="P87" style:parent-style-name="Textbody" style:family="paragraph">
      <style:paragraph-properties fo:text-align="start"/>
    </style:style>
    <style:style style:name="P88" style:parent-style-name="Textbody" style:family="paragraph">
      <style:paragraph-properties fo:text-align="start"/>
    </style:style>
    <style:style style:name="P89" style:parent-style-name="Textbody" style:family="paragraph">
      <style:paragraph-properties fo:text-align="start"/>
    </style:style>
    <style:style style:name="P90" style:parent-style-name="Textbody" style:family="paragraph">
      <style:paragraph-properties fo:text-align="start"/>
    </style:style>
    <style:style style:name="P91" style:parent-style-name="Textbody" style:family="paragraph">
      <style:paragraph-properties fo:text-align="start"/>
    </style:style>
    <style:style style:name="P92" style:parent-style-name="Textbody" style:family="paragraph">
      <style:paragraph-properties fo:text-align="start"/>
    </style:style>
    <style:style style:name="P93" style:parent-style-name="Textbody" style:family="paragraph">
      <style:paragraph-properties fo:text-align="start"/>
    </style:style>
    <style:style style:name="P94" style:parent-style-name="Textbody" style:family="paragraph">
      <style:paragraph-properties fo:text-align="start"/>
    </style:style>
    <style:style style:name="P95" style:parent-style-name="Textbody" style:family="paragraph">
      <style:paragraph-properties fo:text-align="start"/>
    </style:style>
    <style:style style:name="P96" style:parent-style-name="Textbody" style:family="paragraph">
      <style:paragraph-properties fo:text-align="start"/>
    </style:style>
    <style:style style:name="P97" style:parent-style-name="Textbody" style:family="paragraph">
      <style:paragraph-properties fo:text-align="start"/>
    </style:style>
    <style:style style:name="P98" style:parent-style-name="Textbody" style:family="paragraph">
      <style:paragraph-properties fo:text-align="start"/>
    </style:style>
    <style:style style:name="P99" style:parent-style-name="Textbody" style:family="paragraph">
      <style:paragraph-properties fo:text-align="start"/>
    </style:style>
    <style:style style:name="P100" style:parent-style-name="Textbody" style:family="paragraph">
      <style:paragraph-properties fo:text-align="start"/>
    </style:style>
    <style:style style:name="P101" style:parent-style-name="Textbody" style:family="paragraph">
      <style:paragraph-properties fo:text-align="start"/>
    </style:style>
    <style:style style:name="P102" style:parent-style-name="Textbody" style:family="paragraph">
      <style:paragraph-properties fo:text-align="start"/>
    </style:style>
    <style:style style:name="P103" style:parent-style-name="Textbody" style:family="paragraph">
      <style:paragraph-properties fo:text-align="start"/>
    </style:style>
    <style:style style:name="P104" style:parent-style-name="Textbody" style:family="paragraph">
      <style:paragraph-properties fo:text-align="start"/>
    </style:style>
    <style:style style:name="P105" style:parent-style-name="Textbody" style:family="paragraph">
      <style:paragraph-properties fo:text-align="start"/>
    </style:style>
    <style:style style:name="P106" style:parent-style-name="Textbody" style:family="paragraph">
      <style:paragraph-properties fo:text-align="start"/>
    </style:style>
    <style:style style:name="P107" style:parent-style-name="Textbody" style:family="paragraph">
      <style:paragraph-properties fo:text-align="start"/>
    </style:style>
    <style:style style:name="P108" style:parent-style-name="Textbody" style:family="paragraph">
      <style:paragraph-properties fo:text-align="start"/>
    </style:style>
    <style:style style:name="P109" style:parent-style-name="Textbody" style:family="paragraph">
      <style:paragraph-properties fo:text-align="start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2" style:parent-style-name="Standard" style:family="paragraph">
      <style:paragraph-properties fo:line-height="150%"/>
    </style:style>
    <style:style style:name="T113" style:parent-style-name="Основнойшрифтабзаца" style:family="text">
      <style:text-properties fo:language="en" fo:country="US"/>
    </style:style>
    <style:style style:name="P114" style:parent-style-name="Standard" style:family="paragraph">
      <style:paragraph-properties fo:line-height="150%"/>
    </style:style>
    <style:style style:name="T115" style:parent-style-name="StrongEmphasis" style:family="text">
      <style:text-properties fo:font-weight="normal" style:font-weight-asian="normal" style:font-weight-complex="normal" fo:language="en" fo:country="US"/>
    </style:style>
    <style:style style:name="T116" style:parent-style-name="StrongEmphasis" style:family="text">
      <style:text-properties fo:font-weight="normal" style:font-weight-asian="normal" style:font-weight-complex="normal"/>
    </style:style>
    <style:style style:name="T117" style:parent-style-name="StrongEmphasis" style:family="text">
      <style:text-properties fo:font-weight="normal" style:font-weight-asian="normal" style:font-weight-complex="normal" fo:language="en" fo:country="US"/>
    </style:style>
    <style:style style:name="T118" style:parent-style-name="StrongEmphasis" style:family="text">
      <style:text-properties fo:font-weight="normal" style:font-weight-asian="normal" style:font-weight-complex="normal"/>
    </style:style>
    <style:style style:name="T119" style:parent-style-name="StrongEmphasis" style:family="text">
      <style:text-properties fo:font-weight="normal" style:font-weight-asian="normal" style:font-weight-complex="normal" fo:language="en" fo:country="US"/>
    </style:style>
    <style:style style:name="T120" style:parent-style-name="StrongEmphasis" style:family="text">
      <style:text-properties fo:font-weight="normal" style:font-weight-asian="normal" style:font-weight-complex="normal"/>
    </style:style>
    <style:style style:name="T121" style:parent-style-name="StrongEmphasis" style:family="text">
      <style:text-properties fo:font-weight="normal" style:font-weight-asian="normal" style:font-weight-complex="normal"/>
    </style:style>
    <style:style style:name="P122" style:parent-style-name="Textbody" style:family="paragraph">
      <style:paragraph-properties fo:text-align="start"/>
    </style:style>
    <style:style style:name="P123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124" style:parent-style-name="Textbody" style:family="paragraph">
      <style:paragraph-properties fo:text-align="start"/>
    </style:style>
    <style:style style:name="P125" style:parent-style-name="Textbody" style:family="paragraph">
      <style:paragraph-properties fo:text-align="start"/>
    </style:style>
    <style:style style:name="P126" style:parent-style-name="Textbody" style:family="paragraph">
      <style:paragraph-properties fo:text-align="start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Textbody" style:family="paragraph">
      <style:paragraph-properties fo:text-align="start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Textbody" style:family="paragraph">
      <style:paragraph-properties fo:text-align="start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Textbody" style:family="paragraph">
      <style:paragraph-properties fo:text-align="start"/>
    </style:style>
    <style:style style:name="P142" style:parent-style-name="Textbody" style:family="paragraph">
      <style:paragraph-properties fo:text-align="star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15</text:p>
      <text:p text:style-name="Standard"/>
      <text:p text:style-name="Подзаголовок">Тема лабораторной работы: Работа с памятью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4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И. Р. Портузенков<text:s/>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Contents1"><text:a xlink:href="#__RefHeading___Toc1116_1594055144" office:target-frame-name="_top" xlink:show="replace">Постановка задачи<text:tab/>2</text:a></text:p>
          <text:p text:style-name="Contents1"><text:a xlink:href="#__RefHeading___Toc1118_1594055144" office:target-frame-name="_top" xlink:show="replace">Теоретическая часть<text:tab/></text:a>2</text:p>
          <text:p text:style-name="Contents1">Ход выполнения работы<text:tab/>3</text:p>
          <text:p text:style-name="Contents1"><text:a xlink:href="#__RefHeading___Toc1126_1594055144" office:target-frame-name="_top" xlink:show="replace">Листинг программы<text:tab/></text:a>4</text:p>
          <text:p text:style-name="Contents1"><text:a xlink:href="#__RefHeading___Toc1130_1594055144" office:target-frame-name="_top" xlink:show="replace">Список использованной литературы и материалов<text:tab/></text:a>4</text:p>
        </text:index-body>
      </text:table-of-content>
      <text:p text:style-name="Standard"/>
      <text:p text:style-name="Standard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59"/>
      <text:p text:style-name="P60">Постановка задачи</text:p>
      <text:p text:style-name="P61">1. Изучить механизмы работы с памятью в Python на примере стандартного списка (list).</text:p>
      <text:p text:style-name="P62">2. Реализовать собственный динамический массив (аналог списка) с использованием модуля ctypes для работы с низкоуровневой памятью.</text:p>
      <text:p text:style-name="P63">3. Исследовать поведение выделения памяти при добавлении и удалении элементов.</text:p>
      <text:p text:style-name="P64"/>
      <text:p text:style-name="P65">Теоретическая часть</text:p>
      <text:p text:style-name="P66"/>
      <text:p text:style-name="P67">Управление памятью в Python</text:p>
      <text:p text:style-name="P68">Python автоматически управляет памятью с помощью механизма подсчета ссылок и сборщика мусора. Каждый объект в Python хранится в куче (heap), а переменные содержат ссылки на эти объекты.</text:p>
      <text:p text:style-name="P69">Функция id() возвращает уникальный идентификатор объекта, который в CPython представляет собой адрес объекта в памяти. Функция hex() позволяет представить этот адрес в шестнадцатеричной системе счисления.</text:p>
      <text:p text:style-name="P70"/>
      <text:p text:style-name="P71">Модуль ctypes</text:p>
      <text:p text:style-name="P72">Модуль ctypes предоставляет возможность работать с C-типами данных и низкоуровневой памятью напрямую. Функция ctypes.cast() позволяет преобразовать адрес памяти в объект Python. Тип ctypes.py_object используется для хранения ссылок на объекты Python в массиве.</text:p>
      <text:p text:style-name="P73"/>
      <text:p text:style-name="P74">Динамический массив</text:p>
      <text:p text:style-name="P75"/>
      <text:p text:style-name="P76">Динамический массив — это структура данных, которая автоматически изменяет свой размер при добавлении или удалении элементов. Основные принципы:</text:p>
      <text:p text:style-name="P77">- При создании массива выделяется начальная емкость (capacity)</text:p>
      <text:p text:style-name="P78">- Фактическое количество элементов хранится в переменной length</text:p>
      <text:p text:style-name="P79">- При добавлении элемента, если length == capacity, массив расширяется (обычно в 2 раза)</text:p>
      <text:p text:style-name="P80">- При удалении элемента, если length становится значительно меньше capacity, массив может сжиматься</text:p>
      <text:p text:style-name="P81">Функция sys.getsizeof() возвращает размер объекта в байтах, включая накладные расходы интерпретатора.</text:p>
      <text:p text:style-name="P82"/>
      <text:p text:style-name="P83">Ход выполнения работы</text:p>
      <text:p text:style-name="P84"/>
      <text:p text:style-name="P85">Часть 1. Исследование стандартного списка Python</text:p>
      <text:p text:style-name="P86"/>
      <text:p text:style-name="P87">Написан скрипт, который:</text:p>
      <text:p text:style-name="P88">1. Создает переменную и выводит ее значение и адрес в памяти</text:p>
      <text:p text:style-name="P89">2. Использует ctypes.cast() для доступа к объекту по адресу</text:p>
      <text:p text:style-name="P90">3. Динамически добавляет 20 элементов в список, отслеживая изменение размера</text:p>
      <text:p text:style-name="P91">4. Удаляет 20 элементов из списка, отслеживая изменение размера</text:p>
      <text:p text:style-name="P92"/>
      <text:p text:style-name="P93">Результаты исследования:</text:p>
      <text:p text:style-name="P94">- Стандартный список Python имеет начальный размер 56 байт (для пустого списка)</text:p>
      <text:p text:style-name="P95">- При добавлении элементов размер увеличивается не при каждом добавлении, а при достижении порога</text:p>
      <text:p text:style-name="P96">- Стратегия роста: емкость увеличивается примерно в 1.125 раза (на 12.5%)</text:p>
      <text:p text:style-name="P97">- При удалении элементов размер списка не уменьшается (память не освобождается)</text:p>
      <text:p text:style-name="P98"/>
      <text:p text:style-name="P99">Часть 2. Реализация собственного динамического массива</text:p>
      <text:p text:style-name="P100"/>
      <text:soft-page-break/>
      <text:p text:style-name="P101">Реализован класс MyList, который:</text:p>
      <text:p text:style-name="P102">- Использует ctypes.py_object для создания массива фиксированного размера</text:p>
      <text:p text:style-name="P103">- Хранит текущую длину (length) и емкость (capacity)</text:p>
      <text:p text:style-name="P104">- Реализует метод append() с автоматическим расширением (capacity * 2)</text:p>
      <text:p text:style-name="P105">- Реализует метод pop() с автоматическим сжатием при length &lt;= capacity // 2 + 1</text:p>
      <text:p text:style-name="P106">- Поддерживает операцию len() через метод __len__</text:p>
      <text:p text:style-name="P107">- Поддерживает доступ по индексу через метод __getitem__</text:p>
      <text:p text:style-name="P108">Стратегия расширения: при заполнении массива емкость удваивается. Стратегия сжатия: при удалении элементов, когда длина становится меньше или равна половине емкости плюс один, массив сжимается.</text:p>
      <text:p text:style-name="P109"/>
      <text:p text:style-name="P110">Листинг программы</text:p>
      <text:p text:style-name="P111"/>
      <text:p text:style-name="P112">Исходный код программы (листинг) размещен в репозитории<text:s/><text:span text:style-name="T113">GitHub</text:span></text:p>
      <text:p text:style-name="P114"><text:span text:style-name="T115">https</text:span><text:span text:style-name="T116">://</text:span><text:span text:style-name="T117">github</text:span><text:span text:style-name="T118">.</text:span><text:span text:style-name="T119">com</text:span><text:span text:style-name="T120">/</text:span><text:span text:style-name="T121">Ava-Khan/BMSTU_Python_PortuzenkovIR</text:span></text:p>
      <text:p text:style-name="P122"/>
      <text:p text:style-name="P123">Список использованной литературы и материалов</text:p>
      <text:p text:style-name="P124">1. Иванова Г.С. Основы программирования: учебник для вузов. – 4-е изд., стер. – М: изд-во МГТУ им. Н.Э. Баумана, 2007. – 416 с.: ил.</text:p>
      <text:p text:style-name="P125">2. Лутц М. Изучаем Python. – 5-е изд. – М.: Диалектика, 2019. – 1460 с.: ил.</text:p>
      <text:p text:style-name="P126"><text:span text:style-name="T127">3. ctypes — A foreign function library for Python. —<text:s/></text:span>Текст<text:span text:style-name="T128"><text:s/>:<text:s/></text:span>электронный<text:span text:style-name="T129"><text:s/>// Python Documentation : [</text:span>сайт<text:span text:style-name="T130">]. — URL: https://docs.python.org/3/library/ctypes.html</text:span></text:p>
      <text:p text:style-name="P131"><text:span text:style-name="T132">4. sys — System-specific parameters and functions. —<text:s/></text:span>Текст<text:span text:style-name="T133"><text:s/>:<text:s/></text:span>электронный<text:span text:style-name="T134"><text:s/>// Python Documentation : [</text:span>сайт<text:span text:style-name="T135">]. — URL: https://docs.python.org/3/library/sys.html</text:span></text:p>
      <text:p text:style-name="P136"><text:span text:style-name="T137">5. Welcome to python.org. —<text:s/></text:span>Текст<text:span text:style-name="T138"><text:s/>:<text:s/></text:span>электронный<text:span text:style-name="T139"><text:s/>// The official home of the Python Programming Language : [</text:span>сайт<text:span text:style-name="T140">]. — URL: https://www.python.org/</text:span></text:p>
      <text:p text:style-name="P141">6. Git. — Текст : электронный // Git : [сайт]. — URL: https://git-scm.com/</text:p>
      <text:p text:style-name="P142">7. GitHub. — Текст : электронный // GitHub : [сайт]. — URL: https://github.com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54" style:family="table-column">
      <style:table-column-properties style:column-width="1.7319in" style:use-optimal-column-width="false"/>
    </style:style>
    <style:style style:name="TableColumn55" style:family="table-column">
      <style:table-column-properties style:column-width="5.3541in" style:use-optimal-column-width="false"/>
    </style:style>
    <style:style style:name="Table53" style:family="table">
      <style:table-properties style:width="7.0861in" fo:margin-left="0in" table:align="left"/>
    </style:style>
    <style:style style:name="TableRow56" style:family="table-row">
      <style:table-row-properties style:min-row-height="2.0479in" style:use-optimal-row-height="false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/>
    <style:master-page style:next-style-name="MP0" style:name="MPF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>
      <style:footer>
        <text:p text:style-name="Нижнийколонтитулпоцентру">МОСКВА<text:line-break/>2026</text:p>
      </style:footer>
    </style:master-page>
    <style:master-page style:name="MP1" style:page-layout-name="PL1">
      <style:header>
        <text:p text:style-name="Верхнийколонтитулпоцентру"><text:page-number text:fixed="false">4</text:page-number></text:p>
      </style:header>
    </style:master-page>
    <style:master-page style:next-style-name="MP1" style:name="MPF1" style:page-layout-name="PL1">
      <style:header>
        <table:table table:style-name="Table53">
          <table:table-columns>
            <table:table-column table:style-name="TableColumn54"/>
            <table:table-column table:style-name="TableColumn55"/>
          </table:table-columns>
          <table:table-row table:style-name="TableRow56">
            <table:table-cell table:style-name="TableCell57">
              <text:p text:style-name="TableContents"><draw:frame draw:style-name="a1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58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>
      <style:footer>
        <text:p text:style-name="Нижнийколонтитулпоцентру">МОСКВА<text:line-break/>202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y_default</dc:title>
    <dc:creator>k50311</dc:creator>
    <meta:creation-date>2025-09-15T11:13:00Z</meta:creation-date>
    <dc:date>2026-05-29T23:40:00Z</dc:date>
    <meta:template xlink:href="Normal.dotm" xlink:type="simple"/>
    <meta:editing-cycles>16</meta:editing-cycles>
    <meta:editing-duration>PT1800S</meta:editing-duration>
    <meta:document-statistic meta:page-count="5" meta:paragraph-count="9" meta:word-count="710" meta:character-count="4749" meta:row-count="33" meta:non-whitespace-character-count="4048"/>
  </office:meta>
</office:document-meta>
</file>