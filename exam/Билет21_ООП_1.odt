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944in" text:min-label-width="0.1944in" text:list-level-position-and-space-mode="label-alignment">
          <style:list-level-label-alignment text:label-followed-by="listtab" fo:margin-left="0.3888in" fo:text-indent="-0.1944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paragraph-properties fo:margin-bottom="0.2222in"/>
    </style:style>
    <style:style style:name="T3" style:parent-style-name="Основнойшрифтабзаца" style:family="text">
      <style:text-properties fo:font-weight="bold" style:font-weight-asian="bold" style:font-weight-complex="bold" fo:font-size="12.5pt" style:font-size-asian="12.5pt" style:font-size-complex="12.5pt"/>
    </style:style>
    <style:style style:name="P4" style:parent-style-name="Обычный" style:family="paragraph">
      <style:paragraph-properties fo:margin-bottom="0.1111in"/>
    </style:style>
    <style:style style:name="P5" style:parent-style-name="Обычный" style:family="paragraph">
      <style:paragraph-properties fo:margin-bottom="0.1111in"/>
    </style:style>
    <style:style style:name="TableColumn7" style:family="table-column">
      <style:table-column-properties style:column-width="0.0173in"/>
    </style:style>
    <style:style style:name="TableColumn8" style:family="table-column">
      <style:table-column-properties style:column-width="6.4652in"/>
    </style:style>
    <style:style style:name="TableColumn9" style:family="table-column">
      <style:table-column-properties style:column-width="0.0173in"/>
    </style:style>
    <style:style style:name="Table6" style:family="table">
      <style:table-properties style:width="6.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1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8" style:parent-style-name="Обычный" style:family="paragraph">
      <style:text-properties fo:language="en" fo:country="US"/>
    </style:style>
    <style:style style:name="T1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2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2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25" style:parent-style-name="Обычный" style:family="paragraph">
      <style:text-properties fo:language="en" fo:country="US"/>
    </style:style>
    <style:style style:name="T2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2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ableRow28" style:family="table-row">
      <style:table-row-properties/>
    </style:style>
    <style:style style:name="TableCell30" style:family="table-cell">
      <style:table-cell-properties fo:border-top="0in none #FFFFFF" fo:border-left="0.0416in solid #000000" fo:border-bottom="0in none #FFFFFF" fo:border-right="0in none #FFFFFF" fo:background-color="#F2F2F2" style:writing-mode="lr-tb" fo:padding-top="0.0833in" fo:padding-left="0.125in" fo:padding-bottom="0.0833in" fo:padding-right="0.125in"/>
    </style:style>
    <style:style style:name="P29" style:parent-style-name="Обычный" style:family="paragraph"/>
    <style:style style:name="T31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P32" style:parent-style-name="Обычный" style:family="paragraph">
      <style:paragraph-properties fo:margin-bottom="0.1111in"/>
    </style:style>
    <style:style style:name="TableColumn34" style:family="table-column">
      <style:table-column-properties style:column-width="6.5in"/>
    </style:style>
    <style:style style:name="Table33" style:family="table">
      <style:table-properties style:width="6.5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3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3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3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4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4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4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P43" style:parent-style-name="Обычный" style:family="paragraph">
      <style:paragraph-properties fo:margin-bottom="0.1111in"/>
    </style:style>
    <style:style style:name="P44" style:parent-style-name="Обычный" style:family="paragraph">
      <style:paragraph-properties fo:margin-bottom="0.1111in"/>
    </style:style>
    <style:style style:name="P45" style:parent-style-name="Абзацсписка" style:family="paragraph">
      <style:paragraph-properties fo:margin-bottom="0.0555in"/>
    </style:style>
    <style:style style:name="P46" style:parent-style-name="Абзацсписка" style:family="paragraph">
      <style:paragraph-properties fo:margin-bottom="0.0555in"/>
    </style:style>
    <style:style style:name="TableColumn48" style:family="table-column">
      <style:table-column-properties style:column-width="6.5in"/>
    </style:style>
    <style:style style:name="Table47" style:family="table">
      <style:table-properties style:width="6.5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5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5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5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5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5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5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P57" style:parent-style-name="Обычный" style:family="paragraph">
      <style:text-properties fo:language="en" fo:country="US"/>
    </style:style>
    <style:style style:name="T5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5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6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6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6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6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6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6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6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67" style:parent-style-name="Обычный" style:family="paragraph">
      <style:text-properties fo:language="en" fo:country="US"/>
    </style:style>
    <style:style style:name="T6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6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7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7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7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7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P74" style:parent-style-name="Обычный" style:family="paragraph">
      <style:paragraph-properties fo:margin-bottom="0.1111in"/>
    </style:style>
    <style:style style:name="TableColumn76" style:family="table-column">
      <style:table-column-properties style:column-width="6.5in"/>
    </style:style>
    <style:style style:name="Table75" style:family="table">
      <style:table-properties style:width="6.5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7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82" style:parent-style-name="Обычный" style:family="paragraph">
      <style:text-properties fo:language="en" fo:country="US"/>
    </style:style>
    <style:style style:name="T8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86" style:parent-style-name="Обычный" style:family="paragraph">
      <style:text-properties fo:language="en" fo:country="US"/>
    </style:style>
    <style:style style:name="T8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8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90" style:parent-style-name="Обычный" style:family="paragraph">
      <style:text-properties fo:language="en" fo:country="US"/>
    </style:style>
    <style:style style:name="T9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9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9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9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9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9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9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98" style:parent-style-name="Обычный" style:family="paragraph">
      <style:text-properties fo:language="en" fo:country="US"/>
    </style:style>
    <style:style style:name="T9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0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0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0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0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0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05" style:parent-style-name="Обычный" style:family="paragraph">
      <style:paragraph-properties fo:margin-bottom="0.1111in"/>
    </style:style>
    <style:style style:name="TableColumn107" style:family="table-column">
      <style:table-column-properties style:column-width="6.5in"/>
    </style:style>
    <style:style style:name="Table106" style:family="table">
      <style:table-properties style:width="6.5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11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1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1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13" style:parent-style-name="Обычный" style:family="paragraph">
      <style:text-properties fo:language="en" fo:country="US"/>
    </style:style>
    <style:style style:name="T11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1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1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1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1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1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20" style:parent-style-name="Обычный" style:family="paragraph">
      <style:text-properties fo:language="en" fo:country="US"/>
    </style:style>
    <style:style style:name="T12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2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2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2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2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2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2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2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2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3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31" style:parent-style-name="Обычный" style:family="paragraph">
      <style:text-properties fo:language="en" fo:country="US"/>
    </style:style>
    <style:style style:name="T13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3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3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3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3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3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38" style:parent-style-name="Обычный" style:family="paragraph">
      <style:text-properties fo:language="en" fo:country="US"/>
    </style:style>
    <style:style style:name="T13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4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P141" style:parent-style-name="Обычный" style:family="paragraph">
      <style:paragraph-properties fo:margin-bottom="0.1111in"/>
    </style:style>
    <style:style style:name="P142" style:parent-style-name="Обычный" style:family="paragraph">
      <style:paragraph-properties fo:margin-bottom="0.1111in"/>
    </style:style>
    <style:style style:name="TableColumn144" style:family="table-column">
      <style:table-column-properties style:column-width="0.0173in"/>
    </style:style>
    <style:style style:name="TableColumn145" style:family="table-column">
      <style:table-column-properties style:column-width="6.4652in"/>
    </style:style>
    <style:style style:name="TableColumn146" style:family="table-column">
      <style:table-column-properties style:column-width="0.0173in"/>
    </style:style>
    <style:style style:name="Table143" style:family="table">
      <style:table-properties style:width="6.5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14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5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54" style:parent-style-name="Обычный" style:family="paragraph">
      <style:text-properties fo:language="en" fo:country="US"/>
    </style:style>
    <style:style style:name="T15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5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5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60" style:parent-style-name="Обычный" style:family="paragraph">
      <style:text-properties fo:language="en" fo:country="US"/>
    </style:style>
    <style:style style:name="T16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6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6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6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6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6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6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6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6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70" style:parent-style-name="Обычный" style:family="paragraph">
      <style:text-properties fo:language="en" fo:country="US"/>
    </style:style>
    <style:style style:name="T17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7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73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7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ableRow175" style:family="table-row">
      <style:table-row-properties/>
    </style:style>
    <style:style style:name="TableCell177" style:family="table-cell">
      <style:table-cell-properties fo:border-top="0in none #FFFFFF" fo:border-left="0.0416in solid #000000" fo:border-bottom="0in none #FFFFFF" fo:border-right="0in none #FFFFFF" fo:background-color="#F2F2F2" style:writing-mode="lr-tb" fo:padding-top="0.0833in" fo:padding-left="0.125in" fo:padding-bottom="0.0833in" fo:padding-right="0.125in"/>
    </style:style>
    <style:style style:name="P176" style:parent-style-name="Обычный" style:family="paragraph"/>
    <style:style style:name="T178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P179" style:parent-style-name="Обычный" style:family="paragraph">
      <style:paragraph-properties fo:margin-bottom="0.1111in"/>
    </style:style>
    <style:style style:name="TableColumn181" style:family="table-column">
      <style:table-column-properties style:column-width="6.5in"/>
    </style:style>
    <style:style style:name="Table180" style:family="table">
      <style:table-properties style:width="6.5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CCCCCC" fo:background-color="#F2F2F2" style:writing-mode="lr-tb" fo:padding-top="0.0833in" fo:padding-left="0.1111in" fo:padding-bottom="0.0833in" fo:padding-right="0.1111in"/>
    </style:style>
    <style:style style:name="T18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8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8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8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88" style:parent-style-name="Обычный" style:family="paragraph">
      <style:text-properties fo:language="en" fo:country="US"/>
    </style:style>
    <style:style style:name="T18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9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9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93" style:parent-style-name="Обычный" style:family="paragraph">
      <style:text-properties fo:language="en" fo:country="US"/>
    </style:style>
    <style:style style:name="T19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19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96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19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198" style:parent-style-name="Обычный" style:family="paragraph">
      <style:text-properties fo:language="en" fo:country="US"/>
    </style:style>
    <style:style style:name="T199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00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201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T202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203" style:parent-style-name="Обычный" style:family="paragraph">
      <style:text-properties fo:language="en" fo:country="US"/>
    </style:style>
    <style:style style:name="T204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05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P206" style:parent-style-name="Обычный" style:family="paragraph">
      <style:text-properties fo:language="en" fo:country="US"/>
    </style:style>
    <style:style style:name="T207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 fo:language="en" fo:country="US"/>
    </style:style>
    <style:style style:name="T208" style:parent-style-name="Основнойшрифтабзаца" style:family="text">
      <style:text-properties style:font-name="Courier New" style:font-name-asian="Courier New" style:font-name-complex="Courier New" fo:font-size="9.5pt" style:font-size-asian="9.5pt" style:font-size-complex="9.5pt"/>
    </style:style>
    <style:style style:name="P209" style:parent-style-name="Обычный" style:family="paragraph">
      <style:paragraph-properties fo:margin-bottom="0.1111in"/>
    </style:style>
    <style:style style:name="P210" style:parent-style-name="Абзацсписка" style:family="paragraph">
      <style:paragraph-properties fo:margin-bottom="0.0555in"/>
    </style:style>
    <style:style style:name="P211" style:parent-style-name="Абзацсписка" style:family="paragraph">
      <style:paragraph-properties fo:margin-bottom="0.0555in"/>
    </style:style>
    <style:style style:name="P212" style:parent-style-name="Абзацсписка" style:family="paragraph">
      <style:paragraph-properties fo:margin-bottom="0.0555in"/>
    </style:style>
    <style:style style:name="P213" style:parent-style-name="Абзацсписка" style:family="paragraph">
      <style:paragraph-properties fo:margin-bottom="0.0555in"/>
    </style:style>
    <style:style style:name="P214" style:parent-style-name="Обычный" style:family="paragraph">
      <style:paragraph-properties fo:margin-bottom="0.1388in"/>
    </style:style>
  </office:automatic-styles>
  <office:body>
    <office:text text:use-soft-page-breaks="true">
      <text:h text:style-name="P1" text:outline-level="1">Конструктор и деструктор класса. Статические методы.</text:h>
      <text:p text:style-name="P2"><text:span text:style-name="T3">Закрытые методы и атрибуты. Свойства. Наследование. Множественное наследование. Перегрузка операторов.</text:span></text:p>
      <text:h text:style-name="Заголовок2" text:outline-level="2">1. Конструктор и деструктор класса</text:h>
      <text:p text:style-name="P4">Конструктор - это специальный метод __init__, который Python вызывает автоматически в момент создания объекта класса. Он используется для инициализации (задания начальных значений) атрибутов объекта.</text:p>
      <text:p text:style-name="P5">Деструктор - метод __del__, который вызывается, когда объект удаляется сборщиком мусора (например, при выполнении del или при завершении программы). На практике деструкторы в Python используются редко, так как сборка мусора управляется автоматически.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Обычный"><text:span text:style-name="T12">class Dog:</text:span></text:p>
            <text:p text:style-name="Обычный"><text:span text:style-name="T13"><text:s text:c="4"/>def __init__(self, name):</text:span></text:p>
            <text:p text:style-name="Обычный"><text:span text:style-name="T14"><text:s text:c="8"/></text:span><text:span text:style-name="T15">print(f"Создан объект: {name}")</text:span></text:p>
            <text:p text:style-name="Обычный"><text:span text:style-name="T16"><text:s text:c="8"/></text:span><text:span text:style-name="T17">self.name = name</text:span></text:p>
            <text:p text:style-name="P18"/>
            <text:p text:style-name="Обычный"><text:span text:style-name="T19"><text:s text:c="4"/>def __del__(self):</text:span></text:p>
            <text:p text:style-name="Обычный"><text:span text:style-name="T20"><text:s text:c="8"/>print(f"</text:span><text:span text:style-name="T21">Объект</text:span><text:span text:style-name="T22"><text:s/>{self.name}<text:s/></text:span><text:span text:style-name="T23">удалён</text:span><text:span text:style-name="T24">")</text:span></text:p>
            <text:p text:style-name="P25"/>
            <text:p text:style-name="Обычный"><text:span text:style-name="T26">d = Dog("Шарик") <text:s text:c="2"/># Создан объект: Шарик</text:span></text:p>
            <text:p text:style-name="Обычный"><text:span text:style-name="T27">del d <text:s text:c="13"/># Объект Шарик удалён</text:span></text:p>
          </table:table-cell>
          <table:covered-table-cell/>
          <table:table-cell>
            <text:p text:style-name="Обычный"/>
          </table:table-cell>
        </table:table-row>
        <table:table-row table:style-name="TableRow28">
          <table:table-cell>
            <text:p text:style-name="P29"/>
          </table:table-cell>
          <table:table-cell table:style-name="TableCell30" table:number-columns-spanned="2">
            <text:p text:style-name="P29"><text:span text:style-name="T31">Важно: __init__ - это не сам конструктор, а инициализатор. Фактическое создание объекта выполняет метод __new__, но на практике в подавляющем большинстве случаев работают именно с __init__.</text:span></text:p>
          </table:table-cell>
          <table:covered-table-cell/>
        </table:table-row>
      </table:table>
      <text:h text:style-name="Заголовок2" text:outline-level="2">2. Статические методы</text:h>
      <text:p text:style-name="P32">Статический метод - метод, который не зависит от конкретного объекта класса: у него нет доступа ни к self (атрибутам объекта), ни к cls (атрибутам класса). Помечается декоратором @staticmethod. Чаще всего применяется для вспомогательных (служебных) функций, логически связанных с классом.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Обычный"><text:span text:style-name="T37">class MathHelper:</text:span></text:p>
            <text:p text:style-name="Обычный"><text:span text:style-name="T38"><text:s text:c="4"/>@staticmethod</text:span></text:p>
            <text:p text:style-name="Обычный"><text:span text:style-name="T39"><text:s text:c="4"/>def add(a, b):</text:span></text:p>
            <text:p text:style-name="Обычный"><text:span text:style-name="T40"><text:s text:c="8"/></text:span><text:span text:style-name="T41">return a + b</text:span></text:p>
            <text:p text:style-name="Обычный"/>
            <text:p text:style-name="Обычный"><text:span text:style-name="T42">print(MathHelper.add(2, 3)) <text:s text:c="2"/># 5 - вызвали без создания объекта</text:span></text:p>
          </table:table-cell>
        </table:table-row>
      </table:table>
      <text:p text:style-name="P43">Для сравнения: обычный метод класса первым параметром принимает self (текущий объект), а метод класса (@classmethod) первым параметром принимает cls (сам класс).</text:p>
      <text:h text:style-name="Заголовок2" text:outline-level="2">3. Закрытые методы и атрибуты</text:h>
      <text:p text:style-name="P44">В Python нет полноценной приватности (как, например, private в C++ или Java), но существует соглашение об уровнях доступа через нижнее подчёркивание:</text:p>
      <text:list text:style-name="LFO2">
        <text:list-item text:start-value="1">
          <text:p text:style-name="P45">_name - «защищённый» атрибут. Это лишь договорённость: обращаться к нему снаружи класса не рекомендуется, но технически это возможно.</text:p>
        </text:list-item>
      </text:list>
      <text:soft-page-break/>
      <text:list text:style-name="LFO2" text:continue-numbering="true">
        <text:list-item>
          <text:p text:style-name="P46">__name - «приватный» атрибут. Python автоматически переименовывает его (механизм name mangling) в _ИмяКласса__name, что значительно усложняет случайный доступ снаружи.</text:p>
        </text:list-item>
      </text:list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Обычный"><text:span text:style-name="T51">class Account:</text:span></text:p>
            <text:p text:style-name="Обычный"><text:span text:style-name="T52"><text:s text:c="4"/>def __init__(self, balance):</text:span></text:p>
            <text:p text:style-name="Обычный"><text:span text:style-name="T53"><text:s text:c="8"/>self.__balance = balance <text:s text:c="2"/>#<text:s/></text:span><text:span text:style-name="T54">приватный</text:span><text:span text:style-name="T55"><text:s/></text:span><text:span text:style-name="T56">атрибут</text:span></text:p>
            <text:p text:style-name="P57"/>
            <text:p text:style-name="Обычный"><text:span text:style-name="T58"><text:s text:c="4"/>def __secret_method(self): <text:s text:c="4"/>#<text:s/></text:span><text:span text:style-name="T59">приватный</text:span><text:span text:style-name="T60"><text:s/></text:span><text:span text:style-name="T61">метод</text:span></text:p>
            <text:p text:style-name="Обычный"><text:span text:style-name="T62"><text:s text:c="8"/></text:span><text:span text:style-name="T63">return "секрет"</text:span></text:p>
            <text:p text:style-name="Обычный"/>
            <text:p text:style-name="Обычный"><text:span text:style-name="T64"><text:s text:c="4"/>def get_balance(self): <text:s text:c="8"/># публичный метод для доступа</text:span></text:p>
            <text:p text:style-name="Обычный"><text:span text:style-name="T65"><text:s text:c="8"/></text:span><text:span text:style-name="T66">return self.__balance</text:span></text:p>
            <text:p text:style-name="P67"/>
            <text:p text:style-name="Обычный"><text:span text:style-name="T68">acc = Account(100)</text:span></text:p>
            <text:p text:style-name="Обычный"><text:span text:style-name="T69">print(acc.get_balance()) <text:s text:c="2"/># 100</text:span></text:p>
            <text:p text:style-name="Обычный"><text:span text:style-name="T70">print(acc.__balance) <text:s text:c="6"/>#<text:s/></text:span><text:span text:style-name="T71">Ошибка</text:span><text:span text:style-name="T72">!<text:s/></text:span><text:span text:style-name="T73">Прямого доступа нет</text:span></text:p>
          </table:table-cell>
        </table:table-row>
      </table:table>
      <text:h text:style-name="Заголовок2" text:outline-level="2">4. Свойства (properties)</text:h>
      <text:p text:style-name="P74">Свойство позволяет обращаться к методу так, как если бы это был обычный атрибут - без круглых скобок при вызове. Реализуется через декоратор @property (геттер) и @имя.setter (сеттер). Это удобно для контроля доступа: можно проверять корректность данных при записи, либо вычислять значение «на лету» при чтении.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Обычный"><text:span text:style-name="T79">class Circle:</text:span></text:p>
            <text:p text:style-name="Обычный"><text:span text:style-name="T80"><text:s text:c="4"/>def __init__(self, radius):</text:span></text:p>
            <text:p text:style-name="Обычный"><text:span text:style-name="T81"><text:s text:c="8"/>self._radius = radius</text:span></text:p>
            <text:p text:style-name="P82"/>
            <text:p text:style-name="Обычный"><text:span text:style-name="T83"><text:s text:c="4"/>@property</text:span></text:p>
            <text:p text:style-name="Обычный"><text:span text:style-name="T84"><text:s text:c="4"/>def area(self):</text:span></text:p>
            <text:p text:style-name="Обычный"><text:span text:style-name="T85"><text:s text:c="8"/>return 3.14 * self._radius ** 2</text:span></text:p>
            <text:p text:style-name="P86"/>
            <text:p text:style-name="Обычный"><text:span text:style-name="T87"><text:s text:c="4"/>@property</text:span></text:p>
            <text:p text:style-name="Обычный"><text:span text:style-name="T88"><text:s text:c="4"/>def radius(self):</text:span></text:p>
            <text:p text:style-name="Обычный"><text:span text:style-name="T89"><text:s text:c="8"/>return self._radius</text:span></text:p>
            <text:p text:style-name="P90"/>
            <text:p text:style-name="Обычный"><text:span text:style-name="T91"><text:s text:c="4"/>@radius.setter</text:span></text:p>
            <text:p text:style-name="Обычный"><text:span text:style-name="T92"><text:s text:c="4"/>def radius(self, value):</text:span></text:p>
            <text:p text:style-name="Обычный"><text:span text:style-name="T93"><text:s text:c="8"/></text:span><text:span text:style-name="T94">if value &lt; 0:</text:span></text:p>
            <text:p text:style-name="Обычный"><text:span text:style-name="T95"><text:s text:c="12"/>raise ValueError("Радиус не может быть отрицательным")</text:span></text:p>
            <text:p text:style-name="Обычный"><text:span text:style-name="T96"><text:s text:c="8"/></text:span><text:span text:style-name="T97">self._radius = value</text:span></text:p>
            <text:p text:style-name="P98"/>
            <text:p text:style-name="Обычный"><text:span text:style-name="T99">c = Circle(5)</text:span></text:p>
            <text:p text:style-name="Обычный"><text:span text:style-name="T100">print(c.area) <text:s text:c="4"/># 78.5 - вызвали как атрибут, хотя это метод</text:span></text:p>
            <text:p text:style-name="Обычный"><text:span text:style-name="T101">c.radius = 10 <text:s text:c="4"/>#<text:s/></text:span><text:span text:style-name="T102">сработал</text:span><text:span text:style-name="T103"><text:s/>setter</text:span></text:p>
            <text:p text:style-name="Обычный"><text:span text:style-name="T104">print(c.area) <text:s text:c="4"/># 314.0</text:span></text:p>
          </table:table-cell>
        </table:table-row>
      </table:table>
      <text:h text:style-name="Заголовок2" text:outline-level="2">5. Наследование</text:h>
      <text:p text:style-name="P105">Наследование - механизм, при котором класс-потомок автоматически получает все атрибуты и методы родительского класса. Это позволяет повторно использовать код и выстраивать иерархии классов. Метод родителя можно переопределить (override) в потомке, задав в нём метод с тем же именем.</text:p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Обычный"><text:span text:style-name="T110">class Animal:</text:span></text:p>
            <text:p text:style-name="Обычный"><text:span text:style-name="T111"><text:s text:c="4"/>def __init__(self, name):</text:span></text:p>
            <text:p text:style-name="Обычный"><text:span text:style-name="T112"><text:s text:c="8"/>self.name = name</text:span></text:p>
            <text:p text:style-name="P113"/>
            <text:soft-page-break/>
            <text:p text:style-name="Обычный"><text:span text:style-name="T114"><text:s text:c="4"/>def speak(self):</text:span></text:p>
            <text:p text:style-name="Обычный"><text:span text:style-name="T115"><text:s text:c="8"/>return f"{self.name}<text:s/></text:span><text:span text:style-name="T116">издаёт</text:span><text:span text:style-name="T117"><text:s/></text:span><text:span text:style-name="T118">звук</text:span><text:span text:style-name="T119">"</text:span></text:p>
            <text:p text:style-name="P120"/>
            <text:p text:style-name="Обычный"><text:span text:style-name="T121">class Cat(Animal):</text:span></text:p>
            <text:p text:style-name="Обычный"><text:span text:style-name="T122"><text:s text:c="4"/>def speak(self): <text:s text:c="3"/>#<text:s/></text:span><text:span text:style-name="T123">переопределение</text:span><text:span text:style-name="T124"><text:s/></text:span><text:span text:style-name="T125">метода</text:span></text:p>
            <text:p text:style-name="Обычный"><text:span text:style-name="T126"><text:s text:c="8"/>return f"{self.name}<text:s/></text:span><text:span text:style-name="T127">говорит</text:span><text:span text:style-name="T128"><text:s/></text:span><text:span text:style-name="T129">Мяу</text:span><text:span text:style-name="T130">"</text:span></text:p>
            <text:p text:style-name="P131"/>
            <text:p text:style-name="Обычный"><text:span text:style-name="T132">a = Animal("</text:span><text:span text:style-name="T133">Существо</text:span><text:span text:style-name="T134">")</text:span></text:p>
            <text:p text:style-name="Обычный"><text:span text:style-name="T135">c = Cat("</text:span><text:span text:style-name="T136">Мурка</text:span><text:span text:style-name="T137">")</text:span></text:p>
            <text:p text:style-name="P138"/>
            <text:p text:style-name="Обычный"><text:span text:style-name="T139">print(a.speak()) <text:s text:c="2"/># Существо издаёт звук</text:span></text:p>
            <text:p text:style-name="Обычный"><text:span text:style-name="T140">print(c.speak()) <text:s text:c="2"/># Мурка говорит Мяу</text:span></text:p>
          </table:table-cell>
        </table:table-row>
      </table:table>
      <text:soft-page-break/>
      <text:p text:style-name="P141">Для вызова метода родительского класса из потомка используется функция super(), например: super().__init__(name).</text:p>
      <text:h text:style-name="Заголовок2" text:outline-level="2">6. Множественное наследование</text:h>
      <text:p text:style-name="P142">В Python класс может наследоваться сразу от нескольких родительских классов одновременно - это и называется множественным наследованием.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columns-spanned="2">
            <text:p text:style-name="Обычный"><text:span text:style-name="T149">class Flyer:</text:span></text:p>
            <text:p text:style-name="Обычный"><text:span text:style-name="T150"><text:s text:c="4"/>def fly(self):</text:span></text:p>
            <text:p text:style-name="Обычный"><text:span text:style-name="T151"><text:s text:c="8"/>return "</text:span><text:span text:style-name="T152">Летит</text:span><text:span text:style-name="T153">"</text:span></text:p>
            <text:p text:style-name="P154"/>
            <text:p text:style-name="Обычный"><text:span text:style-name="T155">class Swimmer:</text:span></text:p>
            <text:p text:style-name="Обычный"><text:span text:style-name="T156"><text:s text:c="4"/>def swim(self):</text:span></text:p>
            <text:p text:style-name="Обычный"><text:span text:style-name="T157"><text:s text:c="8"/>return "</text:span><text:span text:style-name="T158">Плывёт</text:span><text:span text:style-name="T159">"</text:span></text:p>
            <text:p text:style-name="P160"/>
            <text:p text:style-name="Обычный"><text:span text:style-name="T161">class Duck(Flyer, Swimmer): <text:s text:c="2"/>#<text:s/></text:span><text:span text:style-name="T162">наследует</text:span><text:span text:style-name="T163"><text:s/></text:span><text:span text:style-name="T164">от</text:span><text:span text:style-name="T165"><text:s/></text:span><text:span text:style-name="T166">двух</text:span><text:span text:style-name="T167"><text:s/></text:span><text:span text:style-name="T168">классов</text:span></text:p>
            <text:p text:style-name="Обычный"><text:span text:style-name="T169"><text:s text:c="4"/>pass</text:span></text:p>
            <text:p text:style-name="P170"/>
            <text:p text:style-name="Обычный"><text:span text:style-name="T171">d = Duck()</text:span></text:p>
            <text:p text:style-name="Обычный"><text:span text:style-name="T172">print(d.fly()) <text:s text:c="3"/>#<text:s/></text:span><text:span text:style-name="T173">Летит</text:span></text:p>
            <text:p text:style-name="Обычный"><text:span text:style-name="T174">print(d.swim()) <text:s text:c="2"/># Плывёт</text:span></text:p>
          </table:table-cell>
          <table:covered-table-cell/>
          <table:table-cell>
            <text:p text:style-name="Обычный"/>
          </table:table-cell>
        </table:table-row>
        <table:table-row table:style-name="TableRow175">
          <table:table-cell>
            <text:p text:style-name="P176"/>
          </table:table-cell>
          <table:table-cell table:style-name="TableCell177" table:number-columns-spanned="2">
            <text:p text:style-name="P176"><text:span text:style-name="T178">При множественном наследовании важен MRO (Method Resolution Order) - порядок, в котором Python ищет методы, если одинаковые имена встречаются у нескольких родителей сразу. Узнать порядок можно через атрибут Duck.__mro__.</text:span></text:p>
          </table:table-cell>
          <table:covered-table-cell/>
        </table:table-row>
      </table:table>
      <text:h text:style-name="Заголовок2" text:outline-level="2">7. Перегрузка операторов</text:h>
      <text:p text:style-name="P179">Перегрузка операторов позволяет определить, как стандартные операторы (+, -, ==, &lt; и другие) будут работать с объектами пользовательского класса. Делается это через специальные «магические» (dunder) методы - методы, имена которых начинаются и заканчиваются двумя подчёркиваниями.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Обычный"><text:span text:style-name="T184">class Vector:</text:span></text:p>
            <text:p text:style-name="Обычный"><text:span text:style-name="T185"><text:s text:c="4"/>def __init__(self, x, y):</text:span></text:p>
            <text:p text:style-name="Обычный"><text:span text:style-name="T186"><text:s text:c="8"/>self.x = x</text:span></text:p>
            <text:p text:style-name="Обычный"><text:span text:style-name="T187"><text:s text:c="8"/>self.y = y</text:span></text:p>
            <text:p text:style-name="P188"/>
            <text:p text:style-name="Обычный"><text:span text:style-name="T189"><text:s text:c="4"/></text:span><text:span text:style-name="T190">def __add__(self, other): <text:s text:c="4"/># перегрузка оператора +</text:span></text:p>
            <text:p text:style-name="Обычный"><text:span text:style-name="T191"><text:s text:c="8"/></text:span><text:span text:style-name="T192">return Vector(self.x + other.x, self.y + other.y)</text:span></text:p>
            <text:p text:style-name="P193"/>
            <text:p text:style-name="Обычный"><text:span text:style-name="T194"><text:s text:c="4"/></text:span><text:span text:style-name="T195">def __eq__(self, other): <text:s text:c="5"/># перегрузка оператора ==</text:span></text:p>
            <text:p text:style-name="Обычный"><text:span text:style-name="T196"><text:s text:c="8"/></text:span><text:span text:style-name="T197">return self.x == other.x and self.y == other.y</text:span></text:p>
            <text:p text:style-name="P198"/>
            <text:soft-page-break/>
            <text:p text:style-name="Обычный"><text:span text:style-name="T199"><text:s text:c="4"/></text:span><text:span text:style-name="T200">def __repr__(self): <text:s text:c="10"/># как объект печатается</text:span></text:p>
            <text:p text:style-name="Обычный"><text:span text:style-name="T201"><text:s text:c="8"/></text:span><text:span text:style-name="T202">return f"Vector({self.x}, {self.y})"</text:span></text:p>
            <text:p text:style-name="P203"/>
            <text:p text:style-name="Обычный"><text:span text:style-name="T204">v1 = Vector(1, 2)</text:span></text:p>
            <text:p text:style-name="Обычный"><text:span text:style-name="T205">v2 = Vector(3, 4)</text:span></text:p>
            <text:p text:style-name="P206"/>
            <text:p text:style-name="Обычный"><text:span text:style-name="T207">print(v1 + v2) <text:s text:c="12"/># Vector(4, 6)</text:span></text:p>
            <text:p text:style-name="Обычный"><text:span text:style-name="T208">print(v1 == Vector(1, 2)) # True</text:span></text:p>
          </table:table-cell>
        </table:table-row>
      </table:table>
      <text:soft-page-break/>
      <text:p text:style-name="P209">Наиболее часто перегружаемые магические методы:</text:p>
      <text:list text:style-name="LFO2" text:continue-numbering="true">
        <text:list-item>
          <text:p text:style-name="P210">__add__ (+), __sub__ (-), __mul__ (*), __truediv__ (/)</text:p>
        </text:list-item>
      </text:list>
      <text:list text:style-name="LFO2" text:continue-numbering="true">
        <text:list-item>
          <text:p text:style-name="P211">__eq__ (==), __lt__ (&lt;), __le__ (&lt;=), __gt__ (&gt;)</text:p>
        </text:list-item>
      </text:list>
      <text:list text:style-name="LFO2" text:continue-numbering="true">
        <text:list-item>
          <text:p text:style-name="P212">__str__ и __repr__ - текстовое представление объекта</text:p>
        </text:list-item>
      </text:list>
      <text:list text:style-name="LFO2" text:continue-numbering="true">
        <text:list-item>
          <text:p text:style-name="P213">__len__ - для функции len(), __getitem__ - для индексирования object[i]</text:p>
        </text:list-item>
      </text:list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.5pt" style:font-size-asian="11.5pt" style:font-size-complex="11.5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default-outline-level="1">
      <style:paragraph-properties fo:margin-bottom="0.1944in"/>
      <style:text-properties fo:font-weight="bold" style:font-weight-asian="bold" style:font-weight-complex="bold" fo:font-size="19pt" style:font-size-asian="19pt" style:font-size-complex="19pt" fo:hyphenate="false"/>
    </style:style>
    <style:style style:name="Заголовок2" style:display-name="Заголовок 2" style:family="paragraph" style:default-outline-level="2">
      <style:paragraph-properties fo:border-top="none" fo:border-left="none" fo:border-bottom="0.0104in solid #000000" fo:border-right="none" fo:padding-top="0in" fo:padding-left="0in" fo:padding-bottom="0.0555in" fo:padding-right="0in" style:shadow="none" fo:margin-top="0.25in" fo:margin-bottom="0.1111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default-outline-level="3">
      <style:paragraph-properties fo:margin-top="0.1388in" fo:margin-bottom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Заголовок4" style:display-name="Заголовок 4" style:family="paragraph" style:default-outline-level="4">
      <style:text-properties fo:font-style="italic" style:font-style-asian="italic" style:font-style-complex="italic" fo:color="#2E74B5" fo:hyphenate="false"/>
    </style:style>
    <style:style style:name="Заголовок5" style:display-name="Заголовок 5" style:family="paragraph" style:default-outline-level="5">
      <style:text-properties fo:color="#2E74B5" fo:hyphenate="false"/>
    </style:style>
    <style:style style:name="Заголовок6" style:display-name="Заголовок 6" style:family="paragraph" style:default-outline-level="6">
      <style:text-properties fo:color="#1F4D78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>
      <style:text-properties fo:font-size="28pt" style:font-size-asian="28pt" style:font-size-complex="28pt" fo:hyphenate="false"/>
    </style:style>
    <style:style style:name="Строгий1" style:display-name="Строгий1" style:family="paragraph">
      <style:text-properties fo:font-weight="bold" style:font-weight-asian="bold" style:font-weight-complex="bold" fo:hyphenate="false"/>
    </style:style>
    <style:style style:name="Абзацсписка" style:display-name="Абзац списка" style:family="paragraph">
      <style:text-properties fo:hyphenate="false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/>
    </style:style>
    <style:style style:name="Знаксноски" style:display-name="Знак сноски" style:family="text">
      <style:text-properties style:text-position="super 65.2%"/>
    </style:style>
    <style:style style:name="Текстсноски" style:display-name="Текст сноски" style:family="paragraph">
      <style:text-properties fo:font-size="10pt" style:font-size-asian="10pt" style:font-size-complex="10pt" fo:hyphenate="false"/>
    </style:style>
    <style:style style:name="ТекстсноскиЗнак" style:display-name="Текст сноски Знак" style:family="text">
      <style:text-properties fo:font-size="10pt" style:font-size-asian="10pt" style:font-size-complex="10pt"/>
    </style:style>
    <style:style style:name="Знакконцевойсноски" style:display-name="Знак концевой сноски" style:family="text">
      <style:text-properties style:text-position="super 65.2%"/>
    </style:style>
    <style:style style:name="Текстконцевойсноски" style:display-name="Текст концевой сноски" style:family="paragraph"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>
      <style:text-properties fo:font-size="10pt" style:font-size-asian="10pt" style:font-size-complex="10pt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944in" text:min-label-width="0.1944in" text:list-level-position-and-space-mode="label-alignment">
          <style:list-level-label-alignment text:label-followed-by="listtab" fo:margin-left="0.3888in" fo:text-indent="-0.1944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k50311</dc:creator>
    <meta:creation-date>2026-06-25T04:49:00Z</meta:creation-date>
    <dc:date>2026-06-25T04:49:00Z</dc:date>
    <meta:template xlink:href="Normal.dotm" xlink:type="simple"/>
    <meta:editing-cycles>2</meta:editing-cycles>
    <meta:editing-duration>PT0S</meta:editing-duration>
    <meta:document-statistic meta:page-count="4" meta:paragraph-count="11" meta:word-count="891" meta:character-count="5963" meta:row-count="42" meta:non-whitespace-character-count="5083"/>
  </office:meta>
</office:document-meta>
</file>