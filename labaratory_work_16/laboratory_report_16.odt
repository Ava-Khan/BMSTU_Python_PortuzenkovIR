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59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Textbody" style:family="paragraph">
      <style:paragraph-properties fo:text-align="start"/>
    </style:style>
    <style:style style:name="P61" style:parent-style-name="Textbody" style:family="paragraph">
      <style:paragraph-properties fo:text-align="start"/>
    </style:style>
    <style:style style:name="P62" style:parent-style-name="Textbody" style:family="paragraph">
      <style:paragraph-properties fo:text-align="start"/>
    </style:style>
    <style:style style:name="P63" style:parent-style-name="Textbody" style:family="paragraph">
      <style:paragraph-properties fo:text-align="start"/>
    </style:style>
    <style:style style:name="P64" style:parent-style-name="Textbody" style:family="paragraph">
      <style:paragraph-properties fo:text-align="start"/>
    </style:style>
    <style:style style:name="P65" style:parent-style-name="Textbody" style:family="paragraph">
      <style:paragraph-properties fo:text-align="start"/>
    </style:style>
    <style:style style:name="P66" style:parent-style-name="Textbody" style:family="paragraph">
      <style:paragraph-properties fo:text-align="start"/>
    </style:style>
    <style:style style:name="P67" style:parent-style-name="Textbody" style:family="paragraph">
      <style:paragraph-properties fo:text-align="start"/>
    </style:style>
    <style:style style:name="P68" style:parent-style-name="Textbody" style:family="paragraph">
      <style:paragraph-properties fo:text-align="start"/>
      <style:text-properties fo:language="en" fo:country="US"/>
    </style:style>
    <style:style style:name="P69" style:parent-style-name="Textbody" style:family="paragraph">
      <style:paragraph-properties fo:text-align="start"/>
      <style:text-properties fo:language="en" fo:country="US"/>
    </style:style>
    <style:style style:name="P70" style:parent-style-name="Textbody" style:family="paragraph">
      <style:paragraph-properties fo:text-align="start"/>
      <style:text-properties fo:language="en" fo:country="US"/>
    </style:style>
    <style:style style:name="P71" style:parent-style-name="Textbody" style:family="paragraph">
      <style:paragraph-properties fo:text-align="start"/>
      <style:text-properties fo:language="en" fo:country="US"/>
    </style:style>
    <style:style style:name="P72" style:parent-style-name="Textbody" style:family="paragraph">
      <style:paragraph-properties fo:text-align="start"/>
      <style:text-properties fo:language="en" fo:country="US"/>
    </style:style>
    <style:style style:name="P73" style:parent-style-name="Textbody" style:family="paragraph">
      <style:paragraph-properties fo:text-align="start"/>
      <style:text-properties fo:language="en" fo:country="US"/>
    </style:style>
    <style:style style:name="P74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Textbody" style:family="paragraph">
      <style:paragraph-properties fo:text-align="start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/>
    </style:style>
    <style:style style:name="P78" style:parent-style-name="Textbody" style:family="paragraph">
      <style:paragraph-properties fo:text-align="start"/>
    </style:style>
    <style:style style:name="P79" style:parent-style-name="Textbody" style:family="paragraph">
      <style:paragraph-properties fo:text-align="start"/>
    </style:style>
    <style:style style:name="P80" style:parent-style-name="Textbody" style:family="paragraph">
      <style:paragraph-properties fo:text-align="start"/>
    </style:style>
    <style:style style:name="P81" style:parent-style-name="Textbody" style:family="paragraph">
      <style:paragraph-properties fo:text-align="start"/>
    </style:style>
    <style:style style:name="P82" style:parent-style-name="Textbody" style:family="paragraph">
      <style:paragraph-properties fo:text-align="start"/>
    </style:style>
    <style:style style:name="P83" style:parent-style-name="Textbody" style:family="paragraph">
      <style:paragraph-properties fo:text-align="start"/>
    </style:style>
    <style:style style:name="P84" style:parent-style-name="Textbody" style:family="paragraph">
      <style:paragraph-properties fo:text-align="start"/>
    </style:style>
    <style:style style:name="P85" style:parent-style-name="Textbody" style:family="paragraph">
      <style:paragraph-properties fo:text-align="start"/>
    </style:style>
    <style:style style:name="P86" style:parent-style-name="Textbody" style:family="paragraph">
      <style:paragraph-properties fo:text-align="start"/>
    </style:style>
    <style:style style:name="P87" style:parent-style-name="Textbody" style:family="paragraph">
      <style:paragraph-properties fo:text-align="start"/>
    </style:style>
    <style:style style:name="P88" style:parent-style-name="Textbody" style:family="paragraph">
      <style:paragraph-properties fo:text-align="start"/>
    </style:style>
    <style:style style:name="P89" style:parent-style-name="Textbody" style:family="paragraph">
      <style:paragraph-properties fo:text-align="start"/>
    </style:style>
    <style:style style:name="P90" style:parent-style-name="Textbody" style:family="paragraph">
      <style:paragraph-properties fo:text-align="start"/>
    </style:style>
    <style:style style:name="P91" style:parent-style-name="Textbody" style:family="paragraph">
      <style:paragraph-properties fo:text-align="start"/>
    </style:style>
    <style:style style:name="P92" style:parent-style-name="Textbody" style:family="paragraph">
      <style:paragraph-properties fo:text-align="start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>
      <style:paragraph-properties fo:text-align="start"/>
    </style:style>
    <style:style style:name="P97" style:parent-style-name="Textbody" style:family="paragraph">
      <style:paragraph-properties fo:text-align="start"/>
    </style:style>
    <style:style style:name="P98" style:parent-style-name="Textbody" style:family="paragraph">
      <style:paragraph-properties fo:text-align="start"/>
    </style:style>
    <style:style style:name="P99" style:parent-style-name="Textbody" style:family="paragraph">
      <style:paragraph-properties fo:text-align="start"/>
    </style:style>
    <style:style style:name="P100" style:parent-style-name="Textbody" style:family="paragraph">
      <style:paragraph-properties fo:text-align="start"/>
    </style:style>
    <style:style style:name="P101" style:parent-style-name="Textbody" style:family="paragraph">
      <style:paragraph-properties fo:text-align="start"/>
    </style:style>
    <style:style style:name="P102" style:parent-style-name="Textbody" style:family="paragraph">
      <style:paragraph-properties fo:text-align="start"/>
    </style:style>
    <style:style style:name="P103" style:parent-style-name="Textbody" style:family="paragraph">
      <style:paragraph-properties fo:text-align="start"/>
    </style:style>
    <style:style style:name="P104" style:parent-style-name="Textbody" style:family="paragraph">
      <style:paragraph-properties fo:text-align="start"/>
    </style:style>
    <style:style style:name="P105" style:parent-style-name="Textbody" style:family="paragraph">
      <style:paragraph-properties fo:text-align="start"/>
    </style:style>
    <style:style style:name="P106" style:parent-style-name="Textbody" style:family="paragraph">
      <style:paragraph-properties fo:text-align="start"/>
    </style:style>
    <style:style style:name="P107" style:parent-style-name="Textbody" style:family="paragraph">
      <style:paragraph-properties fo:text-align="start"/>
    </style:style>
    <style:style style:name="P108" style:parent-style-name="Textbody" style:family="paragraph">
      <style:paragraph-properties fo:text-align="start"/>
    </style:style>
    <style:style style:name="P109" style:parent-style-name="Textbody" style:family="paragraph">
      <style:paragraph-properties fo:text-align="start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Textbody" style:family="paragraph">
      <style:paragraph-properties fo:text-align="start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Textbody" style:family="paragraph">
      <style:paragraph-properties fo:text-align="start"/>
    </style:style>
    <style:style style:name="P114" style:parent-style-name="Textbody" style:family="paragraph">
      <style:paragraph-properties fo:text-align="start"/>
    </style:style>
    <style:style style:name="P115" style:parent-style-name="Textbody" style:family="paragraph">
      <style:paragraph-properties fo:text-align="start"/>
    </style:style>
    <style:style style:name="P116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17" style:parent-style-name="Textbody" style:family="paragraph">
      <style:paragraph-properties fo:text-align="start"/>
    </style:style>
    <style:style style:name="P118" style:parent-style-name="Textbody" style:family="paragraph">
      <style:paragraph-properties fo:text-align="start"/>
    </style:style>
    <style:style style:name="P119" style:parent-style-name="Textbody" style:family="paragraph">
      <style:paragraph-properties fo:text-align="start"/>
    </style:style>
    <style:style style:name="P120" style:parent-style-name="Textbody" style:family="paragraph">
      <style:paragraph-properties fo:text-align="start"/>
    </style:style>
    <style:style style:name="P121" style:parent-style-name="Textbody" style:family="paragraph">
      <style:paragraph-properties fo:text-align="start"/>
    </style:style>
    <style:style style:name="P122" style:parent-style-name="Textbody" style:family="paragraph">
      <style:paragraph-properties fo:text-align="start"/>
    </style:style>
    <style:style style:name="P123" style:parent-style-name="Textbody" style:family="paragraph">
      <style:paragraph-properties fo:text-align="start"/>
    </style:style>
    <style:style style:name="P124" style:parent-style-name="Textbody" style:family="paragraph">
      <style:paragraph-properties fo:text-align="start"/>
    </style:style>
    <style:style style:name="P125" style:parent-style-name="Textbody" style:family="paragraph">
      <style:paragraph-properties fo:text-align="start"/>
    </style:style>
    <style:style style:name="P126" style:parent-style-name="Textbody" style:family="paragraph">
      <style:paragraph-properties fo:text-align="start"/>
    </style:style>
    <style:style style:name="P127" style:parent-style-name="Textbody" style:family="paragraph">
      <style:paragraph-properties fo:text-align="start"/>
    </style:style>
    <style:style style:name="P128" style:parent-style-name="Textbody" style:family="paragraph">
      <style:paragraph-properties fo:text-align="start"/>
    </style:style>
    <style:style style:name="P129" style:parent-style-name="Textbody" style:family="paragraph">
      <style:paragraph-properties fo:text-align="start"/>
    </style:style>
    <style:style style:name="P130" style:parent-style-name="Textbody" style:family="paragraph">
      <style:paragraph-properties fo:text-align="start"/>
    </style:style>
    <style:style style:name="P131" style:parent-style-name="Textbody" style:family="paragraph">
      <style:paragraph-properties fo:text-align="start"/>
    </style:style>
    <style:style style:name="P13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33" style:parent-style-name="Standard" style:family="paragraph">
      <style:paragraph-properties fo:line-height="150%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Standard" style:family="paragraph">
      <style:paragraph-properties fo:line-height="150%"/>
    </style:style>
    <style:style style:name="T136" style:parent-style-name="StrongEmphasis" style:family="text">
      <style:text-properties fo:font-weight="normal" style:font-weight-asian="normal" style:font-weight-complex="normal" fo:language="en" fo:country="US"/>
    </style:style>
    <style:style style:name="T137" style:parent-style-name="StrongEmphasis" style:family="text">
      <style:text-properties fo:font-weight="normal" style:font-weight-asian="normal" style:font-weight-complex="normal"/>
    </style:style>
    <style:style style:name="T138" style:parent-style-name="StrongEmphasis" style:family="text">
      <style:text-properties fo:font-weight="normal" style:font-weight-asian="normal" style:font-weight-complex="normal" fo:language="en" fo:country="US"/>
    </style:style>
    <style:style style:name="T139" style:parent-style-name="StrongEmphasis" style:family="text">
      <style:text-properties fo:font-weight="normal" style:font-weight-asian="normal" style:font-weight-complex="normal"/>
    </style:style>
    <style:style style:name="T140" style:parent-style-name="StrongEmphasis" style:family="text">
      <style:text-properties fo:font-weight="normal" style:font-weight-asian="normal" style:font-weight-complex="normal" fo:language="en" fo:country="US"/>
    </style:style>
    <style:style style:name="T141" style:parent-style-name="StrongEmphasis" style:family="text">
      <style:text-properties fo:font-weight="normal" style:font-weight-asian="normal" style:font-weight-complex="normal"/>
    </style:style>
    <style:style style:name="T142" style:parent-style-name="StrongEmphasis" style:family="text">
      <style:text-properties fo:font-weight="normal" style:font-weight-asian="normal" style:font-weight-complex="normal" fo:language="en" fo:country="US"/>
    </style:style>
    <style:style style:name="T143" style:parent-style-name="StrongEmphasis" style:family="text">
      <style:text-properties fo:font-weight="normal" style:font-weight-asian="normal" style:font-weight-complex="normal"/>
    </style:style>
    <style:style style:name="T144" style:parent-style-name="StrongEmphasis" style:family="text">
      <style:text-properties fo:font-weight="normal" style:font-weight-asian="normal" style:font-weight-complex="normal" fo:language="en" fo:country="US"/>
    </style:style>
    <style:style style:name="T145" style:parent-style-name="StrongEmphasis" style:family="text">
      <style:text-properties fo:font-weight="normal" style:font-weight-asian="normal" style:font-weight-complex="normal"/>
    </style:style>
    <style:style style:name="T146" style:parent-style-name="StrongEmphasis" style:family="text">
      <style:text-properties fo:font-weight="normal" style:font-weight-asian="normal" style:font-weight-complex="normal" fo:language="en" fo:country="US"/>
    </style:style>
    <style:style style:name="T147" style:parent-style-name="StrongEmphasis" style:family="text">
      <style:text-properties fo:font-weight="normal" style:font-weight-asian="normal" style:font-weight-complex="normal"/>
    </style:style>
    <style:style style:name="T148" style:parent-style-name="StrongEmphasis" style:family="text">
      <style:text-properties fo:font-weight="normal" style:font-weight-asian="normal" style:font-weight-complex="normal" fo:language="en" fo:country="US"/>
    </style:style>
    <style:style style:name="T149" style:parent-style-name="StrongEmphasis" style:family="text">
      <style:text-properties fo:font-weight="normal" style:font-weight-asian="normal" style:font-weight-complex="normal"/>
    </style:style>
    <style:style style:name="T150" style:parent-style-name="StrongEmphasis" style:family="text">
      <style:text-properties fo:font-weight="normal" style:font-weight-asian="normal" style:font-weight-complex="normal" fo:language="en" fo:country="US"/>
    </style:style>
    <style:style style:name="P151" style:parent-style-name="Textbody" style:family="paragraph">
      <style:paragraph-properties fo:text-align="start"/>
    </style:style>
    <style:style style:name="P15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53" style:parent-style-name="Textbody" style:family="paragraph">
      <style:paragraph-properties fo:text-align="start"/>
    </style:style>
    <style:style style:name="P154" style:parent-style-name="Textbody" style:family="paragraph">
      <style:paragraph-properties fo:text-align="start"/>
    </style:style>
    <style:style style:name="P155" style:parent-style-name="Textbody" style:family="paragraph">
      <style:paragraph-properties fo:text-align="start"/>
    </style:style>
    <style:style style:name="P156" style:parent-style-name="Textbody" style:family="paragraph">
      <style:paragraph-properties fo:text-align="start"/>
    </style:style>
    <style:style style:name="P157" style:parent-style-name="Textbody" style:family="paragraph">
      <style:paragraph-properties fo:text-align="start"/>
    </style:style>
    <style:style style:name="P158" style:parent-style-name="Textbody" style:family="paragraph">
      <style:paragraph-properties fo:text-align="start"/>
    </style:style>
    <style:style style:name="P159" style:parent-style-name="Textbody" style:family="paragraph">
      <style:paragraph-properties fo:text-align="start"/>
    </style:style>
    <style:style style:name="P160" style:parent-style-name="Textbody" style:family="paragraph">
      <style:paragraph-properties fo:text-align="start"/>
    </style:style>
    <style:style style:name="P161" style:parent-style-name="Textbody" style:family="paragraph">
      <style:paragraph-properties fo:text-align="start"/>
    </style:style>
    <style:style style:name="P162" style:parent-style-name="Textbody" style:family="paragraph">
      <style:paragraph-properties fo:text-align="start"/>
    </style:style>
    <style:style style:name="P163" style:parent-style-name="Textbody" style:family="paragraph">
      <style:paragraph-properties fo:text-align="start"/>
    </style:style>
    <style:style style:name="P164" style:parent-style-name="Textbody" style:family="paragraph">
      <style:paragraph-properties fo:text-align="start"/>
    </style:style>
    <style:style style:name="P165" style:parent-style-name="Textbody" style:family="paragraph">
      <style:paragraph-properties fo:text-align="start"/>
    </style:style>
    <style:style style:name="P166" style:parent-style-name="Textbody" style:family="paragraph">
      <style:paragraph-properties fo:text-align="start"/>
    </style:style>
    <style:style style:name="P167" style:parent-style-name="Textbody" style:family="paragraph">
      <style:paragraph-properties fo:text-align="start"/>
    </style:style>
    <style:style style:name="P168" style:parent-style-name="Textbody" style:family="paragraph">
      <style:paragraph-properties fo:text-align="start"/>
    </style:style>
    <style:style style:name="P169" style:parent-style-name="Textbody" style:family="paragraph">
      <style:paragraph-properties fo:text-align="start"/>
    </style:style>
    <style:style style:name="P170" style:parent-style-name="Textbody" style:family="paragraph">
      <style:paragraph-properties fo:text-align="start"/>
    </style:style>
    <style:style style:name="P171" style:parent-style-name="Textbody" style:family="paragraph">
      <style:paragraph-properties fo:text-align="start"/>
    </style:style>
    <style:style style:name="P172" style:parent-style-name="Textbody" style:family="paragraph">
      <style:paragraph-properties fo:text-align="start"/>
    </style:style>
    <style:style style:name="P173" style:parent-style-name="Textbody" style:family="paragraph">
      <style:paragraph-properties fo:text-align="start"/>
    </style:style>
    <style:style style:name="P174" style:parent-style-name="Textbody" style:family="paragraph">
      <style:paragraph-properties fo:text-align="start"/>
    </style:style>
    <style:style style:name="T175" style:parent-style-name="Основнойшрифтабзаца" style:family="text">
      <style:text-properties fo:language="en" fo:country="US"/>
    </style:style>
    <style:style style:name="P176" style:parent-style-name="Textbody" style:family="paragraph">
      <style:paragraph-properties fo:text-align="start"/>
      <style:text-properties fo:language="en" fo:country="US"/>
    </style:style>
    <style:style style:name="P177" style:parent-style-name="Textbody" style:family="paragraph">
      <style:paragraph-properties fo:text-align="start"/>
      <style:text-properties fo:language="en" fo:country="US"/>
    </style:style>
    <style:style style:name="P178" style:parent-style-name="Textbody" style:family="paragraph">
      <style:paragraph-properties fo:text-align="start"/>
      <style:text-properties fo:language="en" fo:country="US"/>
    </style:style>
    <style:style style:name="P179" style:parent-style-name="Textbody" style:family="paragraph">
      <style:paragraph-properties fo:text-align="start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Textbody" style:family="paragraph">
      <style:paragraph-properties fo:text-align="start"/>
    </style:style>
    <style:style style:name="P182" style:parent-style-name="Textbody" style:family="paragraph">
      <style:paragraph-properties fo:text-align="start"/>
    </style:style>
    <style:style style:name="P183" style:parent-style-name="Textbody" style:family="paragraph">
      <style:paragraph-properties fo:text-align="start"/>
    </style:style>
    <style:style style:name="P184" style:parent-style-name="Textbody" style:family="paragraph">
      <style:paragraph-properties fo:text-align="start"/>
    </style:style>
    <style:style style:name="P185" style:parent-style-name="Textbody" style:family="paragraph">
      <style:paragraph-properties fo:text-align="start"/>
    </style:style>
    <style:style style:name="P186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87" style:parent-style-name="Textbody" style:family="paragraph">
      <style:paragraph-properties fo:text-align="start"/>
    </style:style>
    <style:style style:name="P188" style:parent-style-name="Textbody" style:family="paragraph">
      <style:paragraph-properties fo:text-align="start"/>
    </style:style>
    <style:style style:name="P189" style:parent-style-name="Textbody" style:family="paragraph">
      <style:paragraph-properties fo:text-align="start"/>
    </style:style>
    <style:style style:name="P190" style:parent-style-name="Textbody" style:family="paragraph">
      <style:paragraph-properties fo:text-align="start"/>
    </style:style>
    <style:style style:name="P191" style:parent-style-name="Textbody" style:family="paragraph">
      <style:paragraph-properties fo:text-align="start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Textbody" style:family="paragraph">
      <style:paragraph-properties fo:text-align="start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Textbody" style:family="paragraph">
      <style:paragraph-properties fo:text-align="start"/>
    </style:style>
    <style:style style:name="P202" style:parent-style-name="Textbody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16</text:p>
      <text:p text:style-name="Standard"/>
      <text:p text:style-name="Подзаголовок">Тема лабораторной работы: Регулярные выражения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4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И. Р. Портузенков<text:s/>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Contents1"><text:a xlink:href="#__RefHeading___Toc1116_1594055144" office:target-frame-name="_top" xlink:show="replace">Постановка задачи<text:tab/>2</text:a></text:p>
          <text:p text:style-name="Contents1"><text:a xlink:href="#__RefHeading___Toc1118_1594055144" office:target-frame-name="_top" xlink:show="replace">Теоретическая часть<text:tab/></text:a>2</text:p>
          <text:p text:style-name="Contents1">Ход выполнения работы<text:tab/>4</text:p>
          <text:p text:style-name="Contents1"><text:a xlink:href="#__RefHeading___Toc1126_1594055144" office:target-frame-name="_top" xlink:show="replace">Листинг программы<text:tab/></text:a>4</text:p>
          <text:p text:style-name="Contents1"><text:a xlink:href="#__RefHeading___Toc1128_1594055144" office:target-frame-name="_top" xlink:show="replace">Результат работы программы<text:tab/></text:a>4</text:p>
          <text:p text:style-name="Contents1"><text:a xlink:href="#__RefHeading___Toc1130_1594055144" office:target-frame-name="_top" xlink:show="replace">Список использованной литературы и материалов<text:tab/></text:a>5</text:p>
        </text:index-body>
      </text:table-of-content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9">Постановка задачи</text:p>
      <text:p text:style-name="P60"/>
      <text:p text:style-name="P61">Написать программу на языке программирования Python, которая с помощью регулярных выражений извлекает из файла input.txt следующие данные:</text:p>
      <text:p text:style-name="P62">- IP-адреса</text:p>
      <text:p text:style-name="P63">- коды ошибок</text:p>
      <text:p text:style-name="P64">- метод и URL</text:p>
      <text:p text:style-name="P65">- запросы от ботов</text:p>
      <text:p text:style-name="P66"/>
      <text:p text:style-name="P67">Формат входного файла (логи веб-сервера):</text:p>
      <text:p text:style-name="P68">192.168.1.10 - - [04/Apr/2026:10:00:01 +0300] "GET /index.html HTTP/1.1" 200 1024</text:p>
      <text:p text:style-name="P69">10.0.0.5 - - [04/Apr/2026:10:00:02 +0300] "POST /login.php HTTP/1.1" 401 512</text:p>
      <text:p text:style-name="P70">192.168.1.10 - - [04/Apr/2026:10:00:05 +0300] "GET /images/logo.png HTTP/1.1" 200 4500</text:p>
      <text:p text:style-name="P71">203.0.113.45 - - [04/Apr/2026:10:00:10 +0300] "GET /admin/dashboard HTTP/1.1" 403 2048</text:p>
      <text:p text:style-name="P72">172.16.0.1 - - [04/Apr/2026:10:00:15 +0300] "GET /api/data HTTP/1.1" 500 120</text:p>
      <text:p text:style-name="P73"/>
      <text:p text:style-name="P74">Теоретическая часть</text:p>
      <text:p text:style-name="P75"/>
      <text:p text:style-name="P76">Регулярные выражения (Regular Expressions, regex) — это мощный инструмент для поиска, извлечения и замены текста по заданным шаблонам. В Python регулярные выражения реализованы в модуле re.</text:p>
      <text:soft-page-break/>
      <text:p text:style-name="P77">Основные метасимволы и конструкции:</text:p>
      <text:p text:style-name="P78">- \d — любая цифра (0-9)</text:p>
      <text:p text:style-name="P79">- \w — любая буква, цифра или знак подчеркивания</text:p>
      <text:p text:style-name="P80">- \s — любой пробельный символ</text:p>
      <text:p text:style-name="P81">- . — любой символ, кроме перевода строки</text:p>
      <text:p text:style-name="P82">- * — предыдущий символ повторяется 0 или более раз</text:p>
      <text:p text:style-name="P83">- + — предыдущий символ повторяется 1 или более раз</text:p>
      <text:p text:style-name="P84">- ? — предыдущий символ повторяется 0 или 1 раз</text:p>
      <text:p text:style-name="P85">- {n} — предыдущий символ повторяется ровно n раз</text:p>
      <text:p text:style-name="P86">- {n,m} — предыдущий символ повторяется от n до m раз</text:p>
      <text:p text:style-name="P87">- [] — набор допустимых символов</text:p>
      <text:p text:style-name="P88">- () — группа для извлечения подстроки</text:p>
      <text:p text:style-name="P89">- | — логическое ИЛИ</text:p>
      <text:p text:style-name="P90"/>
      <text:p text:style-name="P91">Основные функции модуля re:</text:p>
      <text:p text:style-name="P92"><text:span text:style-name="T93">- re.search(pattern, string) —<text:s/></text:span>ищет<text:span text:style-name="T94"><text:s/></text:span>первое<text:span text:style-name="T95"><text:s/></text:span>совпадение</text:p>
      <text:p text:style-name="P96">- re.findall(pattern, string) — возвращает все совпадения в виде списка</text:p>
      <text:p text:style-name="P97">- re.finditer(pattern, string) — возвращает итератор по всем совпадениям</text:p>
      <text:p text:style-name="P98">- re.sub(pattern, repl, string) — заменяет совпадения</text:p>
      <text:p text:style-name="P99">- re.compile(pattern) — компилирует регулярное выражение для многократного использования</text:p>
      <text:p text:style-name="P100"/>
      <text:p text:style-name="P101">Для данной работы были разработаны следующие регулярные выражения:</text:p>
      <text:p text:style-name="P102">1. Для поиска IP-адресов:</text:p>
      <text:p text:style-name="P103"><text:s text:c="3"/>\d{1,3}\.\d{1,3}\.\d{1,3}\.\d{1,3}</text:p>
      <text:p text:style-name="P104"><text:s text:c="3"/>IP-адрес состоит из четырех чисел от 0 до 255, разделенных точками.</text:p>
      <text:p text:style-name="P105">2. Для поиска кодов ошибок:</text:p>
      <text:p text:style-name="P106"><text:s text:c="3"/>\s(200|401|403|404|500)\s</text:p>
      <text:p text:style-name="P107"><text:s text:c="3"/>Коды ошибок HTTP (200 — успех, 401 — неавторизован, 403 — запрещено, 404 — не найдено, 500 — внутренняя ошибка).</text:p>
      <text:p text:style-name="P108">3. Для извлечения метода HTTP и URL:</text:p>
      <text:soft-page-break/>
      <text:p text:style-name="P109"><text:s text:c="3"/><text:span text:style-name="T110">"(GET|POST|PUT|DELETE|HEAD|OPTIONS|PATCH)\s([^"]+)\sHTTP/\d\.\d"</text:span></text:p>
      <text:p text:style-name="P111"><text:span text:style-name="T112"><text:s text:c="3"/></text:span>Метод запроса, затем пробел, затем URL (любые символы кроме кавычки), затем протокол HTTP.</text:p>
      <text:p text:style-name="P113">4. Для поиска запросов от ботов:</text:p>
      <text:p text:style-name="P114"><text:s text:c="3"/>(bot|Bot|BOT)</text:p>
      <text:p text:style-name="P115"><text:s text:c="3"/>Поиск упоминаний ботов, краулеров и пауков в строке (без учета регистра).</text:p>
      <text:p text:style-name="P116">Ход выполнения работы</text:p>
      <text:p text:style-name="P117"/>
      <text:p text:style-name="P118">1. Создан класс LogParser, инкапсулирующий всю логику парсинга лог-файла.</text:p>
      <text:p text:style-name="P119">2. В конструкторе класса определены регулярные выражения в виде атрибутов:</text:p>
      <text:p text:style-name="P120"><text:s text:c="3"/>- ip_pattern — шаблон для поиска IP-адресов</text:p>
      <text:p text:style-name="P121"><text:s text:c="3"/>- error_pattern — шаблон для поиска кодов ошибок</text:p>
      <text:p text:style-name="P122"><text:s text:c="3"/>- method_url_pattern — шаблон для извлечения метода и URL</text:p>
      <text:p text:style-name="P123"><text:s text:c="3"/>- bot_pattern — шаблон для поиска запросов от ботов</text:p>
      <text:p text:style-name="P124">3. Реализован метод read_file() для чтения содержимого файла.</text:p>
      <text:p text:style-name="P125">4. Реализован метод extract_ips() — поиск всех IP-адресов в файле.</text:p>
      <text:p text:style-name="P126">5. Реализован метод extract_error_codes() — поиск всех кодов ошибок.</text:p>
      <text:p text:style-name="P127">6. Реализован метод extract_method_url() — извлечение пар (метод, URL).</text:p>
      <text:p text:style-name="P128">7. Реализован метод extract_bot_requests() — поиск строк, содержащих запросы от ботов.</text:p>
      <text:p text:style-name="P129">8. Реализован метод print_results() — вывод результатов в консоль.</text:p>
      <text:p text:style-name="P130">9. В блоке if __name__ == "__main__" создается экземпляр класса и запускается парсинг.</text:p>
      <text:p text:style-name="P131"/>
      <text:p text:style-name="P132">Листинг программы</text:p>
      <text:p text:style-name="P133">Исходный код программы (листинг) размещен в репозитории<text:s/><text:span text:style-name="T134">GitHub</text:span></text:p>
      <text:p text:style-name="P135"><text:span text:style-name="T136">https</text:span><text:span text:style-name="T137">://</text:span><text:span text:style-name="T138">github</text:span><text:span text:style-name="T139">.</text:span><text:span text:style-name="T140">com</text:span><text:span text:style-name="T141">/</text:span><text:span text:style-name="T142">Ava</text:span><text:span text:style-name="T143">-</text:span><text:span text:style-name="T144">Khan</text:span><text:span text:style-name="T145">/</text:span><text:span text:style-name="T146">BMSTU</text:span><text:span text:style-name="T147">_</text:span><text:span text:style-name="T148">Python</text:span><text:span text:style-name="T149">_</text:span><text:span text:style-name="T150">PortuzenkovIR</text:span></text:p>
      <text:p text:style-name="P151"/>
      <text:p text:style-name="P152">Результат работы программы</text:p>
      <text:p text:style-name="P153"/>
      <text:p text:style-name="P154">Программа анализирует файл input.txt и выводит следующую информацию:</text:p>
      <text:soft-page-break/>
      <text:p text:style-name="P155">============================================================</text:p>
      <text:p text:style-name="P156">РЕЗУЛЬТАТЫ ПАРСИНГА ЛОГ-ФАЙЛА</text:p>
      <text:p text:style-name="P157">============================================================</text:p>
      <text:p text:style-name="P158"/>
      <text:p text:style-name="P159">1. IP-адреса (5 шт.):</text:p>
      <text:p text:style-name="P160"><text:s text:c="3"/>192.168.1.10</text:p>
      <text:p text:style-name="P161"><text:s text:c="3"/>10.0.0.5</text:p>
      <text:p text:style-name="P162"><text:s text:c="3"/>192.168.1.10</text:p>
      <text:p text:style-name="P163"><text:s text:c="3"/>203.0.113.45</text:p>
      <text:p text:style-name="P164"><text:s text:c="3"/>172.16.0.1</text:p>
      <text:p text:style-name="P165"/>
      <text:p text:style-name="P166">2. Коды ошибок (5 шт.):</text:p>
      <text:p text:style-name="P167"><text:s text:c="3"/>200</text:p>
      <text:p text:style-name="P168"><text:s text:c="3"/>401</text:p>
      <text:p text:style-name="P169"><text:s text:c="3"/>200</text:p>
      <text:p text:style-name="P170"><text:s text:c="3"/>403</text:p>
      <text:p text:style-name="P171"><text:s text:c="3"/>500</text:p>
      <text:p text:style-name="P172"/>
      <text:p text:style-name="P173">3. Метод и URL (5 шт.):</text:p>
      <text:p text:style-name="P174"><text:s text:c="3"/><text:span text:style-name="T175">GET /index.html</text:span></text:p>
      <text:p text:style-name="P176"><text:s text:c="3"/>POST /login.php</text:p>
      <text:p text:style-name="P177"><text:s text:c="3"/>GET /images/logo.png</text:p>
      <text:p text:style-name="P178"><text:s text:c="3"/>GET /admin/dashboard</text:p>
      <text:p text:style-name="P179"><text:span text:style-name="T180"><text:s text:c="3"/></text:span>GET /api/data</text:p>
      <text:p text:style-name="P181"/>
      <text:p text:style-name="P182">4. Запросы от ботов (0 шт.):</text:p>
      <text:p text:style-name="P183"/>
      <text:p text:style-name="P184">============================================================</text:p>
      <text:p text:style-name="P185"/>
      <text:p text:style-name="P186">Список использованной литературы и материалов</text:p>
      <text:p text:style-name="P187"/>
      <text:soft-page-break/>
      <text:p text:style-name="P188">1. Иванова Г.С. Основы программирования: учебник для вузов. – 4-е изд., стер. – М: изд-во МГТУ им. Н.Э. Баумана, 2007. – 416 с.: ил.</text:p>
      <text:p text:style-name="P189">2. Лутц М. Изучаем Python. – 5-е изд. – М.: Диалектика, 2019. – 1460 с.: ил.</text:p>
      <text:p text:style-name="P190">3. Фридл Дж. Регулярные выражения. – 3-е изд. – СПб.: Символ-Плюс, 2009. – 608 с.: ил.</text:p>
      <text:p text:style-name="P191"><text:span text:style-name="T192">4. Welcome to python.org. —<text:s/></text:span>Текст<text:span text:style-name="T193"><text:s/>:<text:s/></text:span>электронный<text:span text:style-name="T194"><text:s/>// The official home of the Python Programming Language : [</text:span>сайт<text:span text:style-name="T195">]. — URL: https://www.python.org/</text:span></text:p>
      <text:p text:style-name="P196"><text:span text:style-name="T197">5. re — Regular expression operations. —<text:s/></text:span>Текст<text:span text:style-name="T198"><text:s/>:<text:s/></text:span>электронный<text:span text:style-name="T199"><text:s/>// Python Documentation : [</text:span>сайт<text:span text:style-name="T200">]. — URL: https://docs.python.org/3/library/re.html</text:span></text:p>
      <text:p text:style-name="P201">6. Git. — Текст : электронный // Git : [сайт]. — URL: https://git-scm.com/</text:p>
      <text:p text:style-name="P202">7. GitHub. — Текст : электронный // GitHub : [сайт]. — URL: https://github.com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54" style:family="table-column">
      <style:table-column-properties style:column-width="1.7319in" style:use-optimal-column-width="false"/>
    </style:style>
    <style:style style:name="TableColumn55" style:family="table-column">
      <style:table-column-properties style:column-width="5.3541in" style:use-optimal-column-width="false"/>
    </style:style>
    <style:style style:name="Table53" style:family="table">
      <style:table-properties style:width="7.0861in" fo:margin-left="0in" table:align="left"/>
    </style:style>
    <style:style style:name="TableRow56" style:family="table-row">
      <style:table-row-properties style:min-row-height="2.0479in" style:use-optimal-row-height="false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  <style:master-page style:name="MP1" style:page-layout-name="PL1">
      <style:header>
        <text:p text:style-name="Верхнийколонтитулпоцентру"><text:page-number text:fixed="false">6</text:page-number></text:p>
      </style:header>
    </style:master-page>
    <style:master-page style:next-style-name="MP1" style:name="MPF1" style:page-layout-name="PL1">
      <style:header>
        <table:table table:style-name="Table53">
          <table:table-columns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8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y_default</dc:title>
    <dc:creator>k50311</dc:creator>
    <meta:creation-date>2025-09-15T11:13:00Z</meta:creation-date>
    <dc:date>2026-05-29T23:40:00Z</dc:date>
    <meta:template xlink:href="Normal.dotm" xlink:type="simple"/>
    <meta:editing-cycles>15</meta:editing-cycles>
    <meta:editing-duration>PT1680S</meta:editing-duration>
    <meta:document-statistic meta:page-count="7" meta:paragraph-count="11" meta:word-count="860" meta:character-count="5753" meta:row-count="40" meta:non-whitespace-character-count="4904"/>
  </office:meta>
</office:document-meta>
</file>