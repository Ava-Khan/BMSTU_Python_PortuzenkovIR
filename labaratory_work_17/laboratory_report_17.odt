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P59" style:parent-style-name="Textbody" style:family="paragraph">
      <style:paragraph-properties fo:text-align="center"/>
    </style:style>
    <style:style style:name="P60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61" style:parent-style-name="Textbody" style:family="paragraph">
      <style:paragraph-properties fo:text-align="start"/>
    </style:style>
    <style:style style:name="P62" style:parent-style-name="Textbody" style:family="paragraph">
      <style:paragraph-properties fo:text-align="start"/>
    </style:style>
    <style:style style:name="P63" style:parent-style-name="Textbody" style:family="paragraph">
      <style:paragraph-properties fo:text-align="start"/>
    </style:style>
    <style:style style:name="P64" style:parent-style-name="Textbody" style:family="paragraph">
      <style:paragraph-properties fo:text-align="start"/>
    </style:style>
    <style:style style:name="P65" style:parent-style-name="Textbody" style:family="paragraph">
      <style:paragraph-properties fo:text-align="start"/>
    </style:style>
    <style:style style:name="P66" style:parent-style-name="Textbody" style:family="paragraph">
      <style:paragraph-properties fo:text-align="start"/>
    </style:style>
    <style:style style:name="P67" style:parent-style-name="Textbody" style:family="paragraph">
      <style:paragraph-properties fo:text-align="start"/>
    </style:style>
    <style:style style:name="P68" style:parent-style-name="Textbody" style:family="paragraph">
      <style:paragraph-properties fo:text-align="start"/>
    </style:style>
    <style:style style:name="P69" style:parent-style-name="Textbody" style:family="paragraph">
      <style:paragraph-properties fo:text-align="start"/>
    </style:style>
    <style:style style:name="P70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71" style:parent-style-name="Textbody" style:family="paragraph">
      <style:paragraph-properties fo:text-align="start"/>
    </style:style>
    <style:style style:name="P72" style:parent-style-name="Textbody" style:family="paragraph">
      <style:paragraph-properties fo:text-align="start"/>
    </style:style>
    <style:style style:name="P73" style:parent-style-name="Textbody" style:family="paragraph">
      <style:paragraph-properties fo:text-align="start"/>
    </style:style>
    <style:style style:name="P74" style:parent-style-name="Textbody" style:family="paragraph">
      <style:paragraph-properties fo:text-align="start"/>
    </style:style>
    <style:style style:name="P75" style:parent-style-name="Textbody" style:family="paragraph">
      <style:paragraph-properties fo:text-align="start"/>
    </style:style>
    <style:style style:name="P76" style:parent-style-name="Textbody" style:family="paragraph">
      <style:paragraph-properties fo:text-align="start"/>
    </style:style>
    <style:style style:name="P77" style:parent-style-name="Textbody" style:family="paragraph">
      <style:paragraph-properties fo:text-align="start"/>
    </style:style>
    <style:style style:name="P78" style:parent-style-name="Textbody" style:family="paragraph">
      <style:paragraph-properties fo:text-align="start"/>
    </style:style>
    <style:style style:name="P79" style:parent-style-name="Textbody" style:family="paragraph">
      <style:paragraph-properties fo:text-align="start"/>
    </style:style>
    <style:style style:name="P80" style:parent-style-name="Textbody" style:family="paragraph">
      <style:paragraph-properties fo:text-align="start"/>
    </style:style>
    <style:style style:name="P81" style:parent-style-name="Textbody" style:family="paragraph">
      <style:paragraph-properties fo:text-align="start"/>
    </style:style>
    <style:style style:name="P82" style:parent-style-name="Textbody" style:family="paragraph">
      <style:paragraph-properties fo:text-align="start"/>
    </style:style>
    <style:style style:name="P83" style:parent-style-name="Textbody" style:family="paragraph">
      <style:paragraph-properties fo:text-align="start"/>
    </style:style>
    <style:style style:name="P84" style:parent-style-name="Textbody" style:family="paragraph">
      <style:paragraph-properties fo:text-align="start"/>
    </style:style>
    <style:style style:name="P85" style:parent-style-name="Textbody" style:family="paragraph">
      <style:paragraph-properties fo:text-align="start"/>
    </style:style>
    <style:style style:name="P86" style:parent-style-name="Textbody" style:family="paragraph">
      <style:paragraph-properties fo:text-align="start"/>
    </style:style>
    <style:style style:name="P87" style:parent-style-name="Textbody" style:family="paragraph">
      <style:paragraph-properties fo:text-align="start"/>
    </style:style>
    <style:style style:name="P88" style:parent-style-name="Textbody" style:family="paragraph">
      <style:paragraph-properties fo:text-align="start"/>
    </style:style>
    <style:style style:name="P89" style:parent-style-name="Textbody" style:family="paragraph">
      <style:paragraph-properties fo:text-align="start"/>
    </style:style>
    <style:style style:name="P90" style:parent-style-name="Textbody" style:family="paragraph">
      <style:paragraph-properties fo:text-align="start"/>
    </style:style>
    <style:style style:name="P91" style:parent-style-name="Textbody" style:family="paragraph">
      <style:paragraph-properties fo:text-align="start"/>
    </style:style>
    <style:style style:name="P92" style:parent-style-name="Textbody" style:family="paragraph">
      <style:paragraph-properties fo:text-align="start"/>
    </style:style>
    <style:style style:name="P93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94" style:parent-style-name="Textbody" style:family="paragraph">
      <style:paragraph-properties fo:text-align="start"/>
    </style:style>
    <style:style style:name="P95" style:parent-style-name="Textbody" style:family="paragraph">
      <style:paragraph-properties fo:text-align="start"/>
    </style:style>
    <style:style style:name="P96" style:parent-style-name="Textbody" style:family="paragraph">
      <style:paragraph-properties fo:text-align="start"/>
    </style:style>
    <style:style style:name="P97" style:parent-style-name="Textbody" style:family="paragraph">
      <style:paragraph-properties fo:text-align="start"/>
    </style:style>
    <style:style style:name="P98" style:parent-style-name="Textbody" style:family="paragraph">
      <style:paragraph-properties fo:text-align="start"/>
    </style:style>
    <style:style style:name="P99" style:parent-style-name="Textbody" style:family="paragraph">
      <style:paragraph-properties fo:text-align="start"/>
    </style:style>
    <style:style style:name="P100" style:parent-style-name="Textbody" style:family="paragraph">
      <style:paragraph-properties fo:text-align="start"/>
    </style:style>
    <style:style style:name="P101" style:parent-style-name="Textbody" style:family="paragraph">
      <style:paragraph-properties fo:text-align="start"/>
    </style:style>
    <style:style style:name="P102" style:parent-style-name="Textbody" style:family="paragraph">
      <style:paragraph-properties fo:text-align="start"/>
    </style:style>
    <style:style style:name="P103" style:parent-style-name="Textbody" style:family="paragraph">
      <style:paragraph-properties fo:text-align="start"/>
    </style:style>
    <style:style style:name="P104" style:parent-style-name="Textbody" style:family="paragraph">
      <style:paragraph-properties fo:text-align="start"/>
    </style:style>
    <style:style style:name="P105" style:parent-style-name="Textbody" style:family="paragraph">
      <style:paragraph-properties fo:text-align="start"/>
    </style:style>
    <style:style style:name="P106" style:parent-style-name="Textbody" style:family="paragraph">
      <style:paragraph-properties fo:text-align="start"/>
    </style:style>
    <style:style style:name="P107" style:parent-style-name="Textbody" style:family="paragraph">
      <style:paragraph-properties fo:text-align="start"/>
    </style:style>
    <style:style style:name="P108" style:parent-style-name="Textbody" style:family="paragraph">
      <style:paragraph-properties fo:text-align="start"/>
    </style:style>
    <style:style style:name="P109" style:parent-style-name="Textbody" style:family="paragraph">
      <style:paragraph-properties fo:text-align="start"/>
    </style:style>
    <style:style style:name="P110" style:parent-style-name="Textbody" style:family="paragraph">
      <style:paragraph-properties fo:text-align="start"/>
    </style:style>
    <style:style style:name="P111" style:parent-style-name="Textbody" style:family="paragraph">
      <style:paragraph-properties fo:text-align="start"/>
    </style:style>
    <style:style style:name="P112" style:parent-style-name="Textbody" style:family="paragraph">
      <style:paragraph-properties fo:text-align="start"/>
    </style:style>
    <style:style style:name="P113" style:parent-style-name="Textbody" style:family="paragraph">
      <style:paragraph-properties fo:text-align="start"/>
    </style:style>
    <style:style style:name="P114" style:parent-style-name="Textbody" style:family="paragraph">
      <style:paragraph-properties fo:text-align="start"/>
    </style:style>
    <style:style style:name="P115" style:parent-style-name="Textbody" style:family="paragraph">
      <style:paragraph-properties fo:text-align="start"/>
    </style:style>
    <style:style style:name="P116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117" style:parent-style-name="Standard" style:family="paragraph">
      <style:paragraph-properties fo:line-height="150%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Standard" style:family="paragraph">
      <style:paragraph-properties fo:line-height="150%"/>
    </style:style>
    <style:style style:name="T120" style:parent-style-name="StrongEmphasis" style:family="text">
      <style:text-properties fo:font-weight="normal" style:font-weight-asian="normal" style:font-weight-complex="normal" fo:language="en" fo:country="US"/>
    </style:style>
    <style:style style:name="T121" style:parent-style-name="StrongEmphasis" style:family="text">
      <style:text-properties fo:font-weight="normal" style:font-weight-asian="normal" style:font-weight-complex="normal"/>
    </style:style>
    <style:style style:name="T122" style:parent-style-name="StrongEmphasis" style:family="text">
      <style:text-properties fo:font-weight="normal" style:font-weight-asian="normal" style:font-weight-complex="normal" fo:language="en" fo:country="US"/>
    </style:style>
    <style:style style:name="T123" style:parent-style-name="StrongEmphasis" style:family="text">
      <style:text-properties fo:font-weight="normal" style:font-weight-asian="normal" style:font-weight-complex="normal"/>
    </style:style>
    <style:style style:name="T124" style:parent-style-name="StrongEmphasis" style:family="text">
      <style:text-properties fo:font-weight="normal" style:font-weight-asian="normal" style:font-weight-complex="normal" fo:language="en" fo:country="US"/>
    </style:style>
    <style:style style:name="T125" style:parent-style-name="StrongEmphasis" style:family="text">
      <style:text-properties fo:font-weight="normal" style:font-weight-asian="normal" style:font-weight-complex="normal"/>
    </style:style>
    <style:style style:name="T126" style:parent-style-name="StrongEmphasis" style:family="text">
      <style:text-properties fo:font-weight="normal" style:font-weight-asian="normal" style:font-weight-complex="normal" fo:language="en" fo:country="US"/>
    </style:style>
    <style:style style:name="T127" style:parent-style-name="StrongEmphasis" style:family="text">
      <style:text-properties fo:font-weight="normal" style:font-weight-asian="normal" style:font-weight-complex="normal"/>
    </style:style>
    <style:style style:name="T128" style:parent-style-name="StrongEmphasis" style:family="text">
      <style:text-properties fo:font-weight="normal" style:font-weight-asian="normal" style:font-weight-complex="normal" fo:language="en" fo:country="US"/>
    </style:style>
    <style:style style:name="T129" style:parent-style-name="StrongEmphasis" style:family="text">
      <style:text-properties fo:font-weight="normal" style:font-weight-asian="normal" style:font-weight-complex="normal"/>
    </style:style>
    <style:style style:name="T130" style:parent-style-name="StrongEmphasis" style:family="text">
      <style:text-properties fo:font-weight="normal" style:font-weight-asian="normal" style:font-weight-complex="normal" fo:language="en" fo:country="US"/>
    </style:style>
    <style:style style:name="T131" style:parent-style-name="StrongEmphasis" style:family="text">
      <style:text-properties fo:font-weight="normal" style:font-weight-asian="normal" style:font-weight-complex="normal"/>
    </style:style>
    <style:style style:name="T132" style:parent-style-name="StrongEmphasis" style:family="text">
      <style:text-properties fo:font-weight="normal" style:font-weight-asian="normal" style:font-weight-complex="normal" fo:language="en" fo:country="US"/>
    </style:style>
    <style:style style:name="T133" style:parent-style-name="StrongEmphasis" style:family="text">
      <style:text-properties fo:font-weight="normal" style:font-weight-asian="normal" style:font-weight-complex="normal"/>
    </style:style>
    <style:style style:name="T134" style:parent-style-name="StrongEmphasis" style:family="text">
      <style:text-properties fo:font-weight="normal" style:font-weight-asian="normal" style:font-weight-complex="normal" fo:language="en" fo:country="US"/>
    </style:style>
    <style:style style:name="P135" style:parent-style-name="Textbody" style:family="paragraph">
      <style:paragraph-properties fo:text-align="start"/>
    </style:style>
    <style:style style:name="P136" style:parent-style-name="Textbody" style:family="paragraph">
      <style:paragraph-properties fo:text-align="center"/>
    </style:style>
    <style:style style:name="T137" style:parent-style-name="Основнойшрифтабзаца" style:family="text">
      <style:text-properties fo:font-weight="bold" style:font-weight-asian="bold" style:font-weight-complex="bold"/>
    </style:style>
    <style:style style:name="P138" style:parent-style-name="Textbody" style:family="paragraph">
      <style:paragraph-properties fo:text-align="start"/>
    </style:style>
    <style:style style:name="P139" style:parent-style-name="Textbody" style:family="paragraph">
      <style:paragraph-properties fo:text-align="start"/>
    </style:style>
    <style:style style:name="P140" style:parent-style-name="Textbody" style:family="paragraph">
      <style:paragraph-properties fo:text-align="start"/>
    </style:style>
    <style:style style:name="P141" style:parent-style-name="Textbody" style:family="paragraph">
      <style:paragraph-properties fo:text-align="start"/>
    </style:style>
    <style:style style:name="P142" style:parent-style-name="Textbody" style:family="paragraph">
      <style:paragraph-properties fo:text-align="start"/>
    </style:style>
    <style:style style:name="P143" style:parent-style-name="Textbody" style:family="paragraph">
      <style:paragraph-properties fo:text-align="start"/>
    </style:style>
    <style:style style:name="P144" style:parent-style-name="Textbody" style:family="paragraph">
      <style:paragraph-properties fo:text-align="start"/>
    </style:style>
    <style:style style:name="P145" style:parent-style-name="Textbody" style:family="paragraph">
      <style:paragraph-properties fo:text-align="start"/>
    </style:style>
    <style:style style:name="P146" style:parent-style-name="Textbody" style:family="paragraph">
      <style:paragraph-properties fo:text-align="start"/>
    </style:style>
    <style:style style:name="P147" style:parent-style-name="Textbody" style:family="paragraph">
      <style:paragraph-properties fo:text-align="start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P151" style:parent-style-name="Textbody" style:family="paragraph">
      <style:paragraph-properties fo:text-align="start"/>
      <style:text-properties fo:language="en" fo:country="US"/>
    </style:style>
    <style:style style:name="P152" style:parent-style-name="Textbody" style:family="paragraph">
      <style:paragraph-properties fo:text-align="start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P158" style:parent-style-name="Textbody" style:family="paragraph">
      <style:paragraph-properties fo:text-align="start"/>
      <style:text-properties fo:language="en" fo:country="US"/>
    </style:style>
    <style:style style:name="P159" style:parent-style-name="Textbody" style:family="paragraph">
      <style:paragraph-properties fo:text-align="start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P163" style:parent-style-name="Textbody" style:family="paragraph">
      <style:paragraph-properties fo:text-align="start"/>
      <style:text-properties fo:language="en" fo:country="US"/>
    </style:style>
    <style:style style:name="P164" style:parent-style-name="Textbody" style:family="paragraph">
      <style:paragraph-properties fo:text-align="start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P169" style:parent-style-name="Textbody" style:family="paragraph">
      <style:paragraph-properties fo:text-align="start"/>
      <style:text-properties fo:language="en" fo:country="US"/>
    </style:style>
    <style:style style:name="P170" style:parent-style-name="Textbody" style:family="paragraph">
      <style:paragraph-properties fo:text-align="start"/>
    </style:style>
    <style:style style:name="P171" style:parent-style-name="Textbody" style:family="paragraph">
      <style:paragraph-properties fo:text-align="start"/>
    </style:style>
    <style:style style:name="P172" style:parent-style-name="Textbody" style:family="paragraph">
      <style:paragraph-properties fo:text-align="start"/>
    </style:style>
    <style:style style:name="P173" style:parent-style-name="Textbody" style:family="paragraph">
      <style:paragraph-properties fo:text-align="start"/>
    </style:style>
    <style:style style:name="P174" style:parent-style-name="Textbody" style:family="paragraph">
      <style:paragraph-properties fo:text-align="start"/>
    </style:style>
    <style:style style:name="P175" style:parent-style-name="Textbody" style:family="paragraph">
      <style:paragraph-properties fo:text-align="start"/>
    </style:style>
    <style:style style:name="P176" style:parent-style-name="Textbody" style:family="paragraph">
      <style:paragraph-properties fo:text-align="start"/>
    </style:style>
    <style:style style:name="P177" style:parent-style-name="Textbody" style:family="paragraph">
      <style:paragraph-properties fo:text-align="start"/>
    </style:style>
    <style:style style:name="P178" style:parent-style-name="Textbody" style:family="paragraph">
      <style:paragraph-properties fo:text-align="start"/>
    </style:style>
    <style:style style:name="P179" style:parent-style-name="Textbody" style:family="paragraph">
      <style:paragraph-properties fo:text-align="start"/>
    </style:style>
    <style:style style:name="P180" style:parent-style-name="Textbody" style:family="paragraph">
      <style:paragraph-properties fo:text-align="start"/>
    </style:style>
    <style:style style:name="P181" style:parent-style-name="Textbody" style:family="paragraph">
      <style:paragraph-properties fo:text-align="start"/>
    </style:style>
    <style:style style:name="P182" style:parent-style-name="Textbody" style:family="paragraph">
      <style:paragraph-properties fo:text-align="start"/>
    </style:style>
    <style:style style:name="P183" style:parent-style-name="Textbody" style:family="paragraph">
      <style:paragraph-properties fo:text-align="start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P187" style:parent-style-name="Textbody" style:family="paragraph">
      <style:paragraph-properties fo:text-align="start"/>
      <style:text-properties fo:language="en" fo:country="US"/>
    </style:style>
    <style:style style:name="P188" style:parent-style-name="Textbody" style:family="paragraph">
      <style:paragraph-properties fo:text-align="start"/>
    </style:style>
    <style:style style:name="T189" style:parent-style-name="Основнойшрифтабзаца" style:family="text">
      <style:text-properties fo:language="en" fo:country="US"/>
    </style:style>
    <style:style style:name="P190" style:parent-style-name="Textbody" style:family="paragraph">
      <style:paragraph-properties fo:text-align="start"/>
    </style:style>
    <style:style style:name="P191" style:parent-style-name="Textbody" style:family="paragraph">
      <style:paragraph-properties fo:text-align="start"/>
    </style:style>
    <style:style style:name="P192" style:parent-style-name="Textbody" style:family="paragraph">
      <style:paragraph-properties fo:text-align="start"/>
    </style:style>
    <style:style style:name="T193" style:parent-style-name="Основнойшрифтабзаца" style:family="text">
      <style:text-properties fo:language="en" fo:country="US"/>
    </style:style>
    <style:style style:name="P194" style:parent-style-name="Textbody" style:family="paragraph">
      <style:paragraph-properties fo:text-align="start"/>
    </style:style>
    <style:style style:name="T195" style:parent-style-name="Основнойшрифтабзаца" style:family="text">
      <style:text-properties fo:language="en" fo:country="US"/>
    </style:style>
    <style:style style:name="P196" style:parent-style-name="Textbody" style:family="paragraph">
      <style:paragraph-properties fo:text-align="start"/>
    </style:style>
    <style:style style:name="P197" style:parent-style-name="Textbody" style:family="paragraph">
      <style:paragraph-properties fo:text-align="start"/>
    </style:style>
    <style:style style:name="P198" style:parent-style-name="Textbody" style:family="paragraph">
      <style:paragraph-properties fo:text-align="start"/>
    </style:style>
    <style:style style:name="T199" style:parent-style-name="Основнойшрифтабзаца" style:family="text">
      <style:text-properties fo:language="en" fo:country="US"/>
    </style:style>
    <style:style style:name="P200" style:parent-style-name="Textbody" style:family="paragraph">
      <style:paragraph-properties fo:text-align="start"/>
    </style:style>
    <style:style style:name="T201" style:parent-style-name="Основнойшрифтабзаца" style:family="text">
      <style:text-properties fo:language="en" fo:country="US"/>
    </style:style>
    <style:style style:name="P202" style:parent-style-name="Textbody" style:family="paragraph">
      <style:paragraph-properties fo:text-align="start"/>
    </style:style>
    <style:style style:name="P203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204" style:parent-style-name="Textbody" style:family="paragraph">
      <style:paragraph-properties fo:text-align="start"/>
    </style:style>
    <style:style style:name="P205" style:parent-style-name="Textbody" style:family="paragraph">
      <style:paragraph-properties fo:text-align="start"/>
    </style:style>
    <style:style style:name="P206" style:parent-style-name="Textbody" style:family="paragraph">
      <style:paragraph-properties fo:text-align="start"/>
    </style:style>
    <style:style style:name="P207" style:parent-style-name="Textbody" style:family="paragraph">
      <style:paragraph-properties fo:text-align="start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P212" style:parent-style-name="Textbody" style:family="paragraph">
      <style:paragraph-properties fo:text-align="start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P217" style:parent-style-name="Textbody" style:family="paragraph">
      <style:paragraph-properties fo:text-align="start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P222" style:parent-style-name="Textbody" style:family="paragraph">
      <style:paragraph-properties fo:text-align="start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P227" style:parent-style-name="Textbody" style:family="paragraph">
      <style:paragraph-properties fo:text-align="start"/>
    </style:style>
    <style:style style:name="P228" style:parent-style-name="Textbody" style:family="paragraph">
      <style:paragraph-properties fo:text-align="star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17</text:p>
      <text:p text:style-name="Standard"/>
      <text:p text:style-name="Подзаголовок">Тема лабораторной работы: базовое администрирование Linux с использованием Python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4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И. Р. Портузенков<text:s/>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М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Содержание</text:p>
          <text:p text:style-name="Contents1"><text:a xlink:href="#__RefHeading___Toc1116_1594055144" office:target-frame-name="_top" xlink:show="replace">Постановка задачи<text:tab/>2</text:a></text:p>
          <text:p text:style-name="Contents1"><text:a xlink:href="#__RefHeading___Toc1118_1594055144" office:target-frame-name="_top" xlink:show="replace">Теоретическая часть<text:tab/></text:a>2</text:p>
          <text:p text:style-name="Contents1">Ход выполнения работы<text:tab/>3</text:p>
          <text:p text:style-name="Contents1"><text:a xlink:href="#__RefHeading___Toc1126_1594055144" office:target-frame-name="_top" xlink:show="replace">Листинг программы<text:tab/></text:a>4</text:p>
          <text:p text:style-name="Contents1"><text:a xlink:href="#__RefHeading___Toc1128_1594055144" office:target-frame-name="_top" xlink:show="replace">Результат работы программы<text:tab/></text:a>4</text:p>
          <text:p text:style-name="Contents1"><text:a xlink:href="#__RefHeading___Toc1130_1594055144" office:target-frame-name="_top" xlink:show="replace">Список использованной литературы и материалов<text:tab/></text:a>6</text:p>
        </text:index-body>
      </text:table-of-content>
      <text:p text:style-name="Standard"/>
      <text:p text:style-name="Standard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59"/>
      <text:p text:style-name="P60">Постановка задачи</text:p>
      <text:p text:style-name="P61"/>
      <text:p text:style-name="P62">Написать программы на языке программирования Python, которые выполняют следующие функции администрирования операционной системы Linux:</text:p>
      <text:p text:style-name="P63">- создание и удаление пользователей</text:p>
      <text:p text:style-name="P64">- копирование и удаление файлов</text:p>
      <text:p text:style-name="P65">- вывод данных о загрузке процессора, оперативной памяти и диска</text:p>
      <text:p text:style-name="P66">- вывод списка запущенных процессов</text:p>
      <text:p text:style-name="P67">- запуск выполнения задачи по расписанию</text:p>
      <text:p text:style-name="P68">- выполнение резервной копии данных и изменение прав доступа</text:p>
      <text:p text:style-name="P69"/>
      <text:p text:style-name="P70">Теоретическая часть</text:p>
      <text:p text:style-name="P71"/>
      <text:p text:style-name="P72">Администрирование Linux с помощью Python</text:p>
      <text:p text:style-name="P73"/>
      <text:p text:style-name="P74">Python является мощным инструментом для автоматизации задач системного администрирования благодаря наличию множества библиотек, предоставляющих доступ к системным вызовам и функциям ОС.</text:p>
      <text:p text:style-name="P75"/>
      <text:p text:style-name="P76">Используемые библиотеки:</text:p>
      <text:p text:style-name="P77"/>
      <text:p text:style-name="P78">1. subprocess — позволяет запускать системные команды и получать результат их выполнения. Используется для вызова таких команд, как useradd, userdel, chmod и других.</text:p>
      <text:soft-page-break/>
      <text:p text:style-name="P79">2. shutil — предоставляет высокоуровневые операции с файлами: копирование, перемещение, удаление целых директорий.</text:p>
      <text:p text:style-name="P80">3. psutil — библиотека для получения информации о работе системы: загрузка CPU, использование памяти, состояние дисков, список процессов.</text:p>
      <text:p text:style-name="P81">4. schedule — библиотека для планирования выполнения задач по расписанию с удобным синтаксисом (каждый день в 3:00, каждые 5 минут и т.д.).</text:p>
      <text:p text:style-name="P82">5. os — стандартная библиотека для взаимодействия с операционной системой: удаление файлов, изменение прав доступа, работа с путями.</text:p>
      <text:p text:style-name="P83"/>
      <text:p text:style-name="P84">Права доступа в Linux (chmod)</text:p>
      <text:p text:style-name="P85">Права доступа в Linux задаются для трех категорий пользователей: владелец, группа, остальные. Каждая категория может иметь права на чтение (r=4), запись (w=2) и выполнение (x=1). Числовое представление (например, 0o755) означает:</text:p>
      <text:p text:style-name="P86">- 7 (4+2+1) — полный доступ для владельца</text:p>
      <text:p text:style-name="P87">- 5 (4+1) — чтение и выполнение для группы</text:p>
      <text:p text:style-name="P88">- 5 (4+1) — чтение и выполнение для остальных</text:p>
      <text:p text:style-name="P89"/>
      <text:p text:style-name="P90">Управление пользователями</text:p>
      <text:p text:style-name="P91">Команда useradd создает нового пользователя в системе. Для выполнения этой команды требуются права суперпользователя (sudo). Команда userdel удаляет пользователя.</text:p>
      <text:p text:style-name="P92"/>
      <text:p text:style-name="P93">Ход выполнения работы</text:p>
      <text:p text:style-name="P94"/>
      <text:p text:style-name="P95">1. Установка необходимых библиотек:</text:p>
      <text:p text:style-name="P96">pip3 install psutil paramiko schedule</text:p>
      <text:p text:style-name="P97"/>
      <text:p text:style-name="P98">2. Реализация функций управления пользователями:</text:p>
      <text:p text:style-name="P99">Создание пользователя с использованием subprocess.run() для вызова команды useradd. Удаление пользователя с помощью команды userdel. Обе функции требуют прав sudo.</text:p>
      <text:p text:style-name="P100"/>
      <text:p text:style-name="P101">3. Реализация функций копирования и удаления файлов:</text:p>
      <text:p text:style-name="P102">Копирование файлов реализовано с помощью shutil.copy(). Удаление — с помощью os.remove().</text:p>
      <text:p text:style-name="P103"/>
      <text:p text:style-name="P104">4. Реализация мониторинга ресурсов:</text:p>
      <text:p text:style-name="P105">Функция monitor_resources() в бесконечном цикле получает данные о загрузке CPU через psutil.cpu_percent(), об использовании памяти через psutil.virtual_memory() и диска через psutil.disk_usage('/'). Данные выводятся каждые 5 секунд.</text:p>
      <text:p text:style-name="P106"/>
      <text:p text:style-name="P107">5. Реализация вывода списка процессов:</text:p>
      <text:p text:style-name="P108">Функция list_processes() с помощью psutil.process_iter() перебирает все запущенные процессы и выводит их PID и имя.</text:p>
      <text:p text:style-name="P109"/>
      <text:p text:style-name="P110">6. Реализация планировщика задач:</text:p>
      <text:p text:style-name="P111">Функция job() содержит задачу, которая выполняется по расписанию. Schedule позволяет настроить запуск в определенное время (например, каждый день в 3:00).</text:p>
      <text:p text:style-name="P112"/>
      <text:p text:style-name="P113">7. Реализация резервного копирования и изменения прав:</text:p>
      <text:p text:style-name="P114">Резервное копирование выполняется с помощью shutil.copytree(), копирующего целую директорию. Изменение прав доступа — через os.chmod() с числовым кодом прав.</text:p>
      <text:p text:style-name="P115"/>
      <text:p text:style-name="P116">Листинг программы</text:p>
      <text:p text:style-name="P117">Исходный код программы (листинг) размещен в репозитории<text:s/><text:span text:style-name="T118">GitHub</text:span></text:p>
      <text:p text:style-name="P119"><text:span text:style-name="T120">https</text:span><text:span text:style-name="T121">://</text:span><text:span text:style-name="T122">github</text:span><text:span text:style-name="T123">.</text:span><text:span text:style-name="T124">com</text:span><text:span text:style-name="T125">/</text:span><text:span text:style-name="T126">Ava</text:span><text:span text:style-name="T127">-</text:span><text:span text:style-name="T128">Khan</text:span><text:span text:style-name="T129">/</text:span><text:span text:style-name="T130">BMSTU</text:span><text:span text:style-name="T131">_</text:span><text:span text:style-name="T132">Python</text:span><text:span text:style-name="T133">_</text:span><text:span text:style-name="T134">PortuzenkovIR</text:span></text:p>
      <text:p text:style-name="P135"/>
      <text:p text:style-name="P136"><text:span text:style-name="T137">Результат работы программы</text:span></text:p>
      <text:p text:style-name="P138"/>
      <text:p text:style-name="P139">1. Создание пользователя:</text:p>
      <text:p text:style-name="P140"><text:s text:c="3"/>add_user('noviy_user')</text:p>
      <text:soft-page-break/>
      <text:p text:style-name="P141"><text:s text:c="3"/>Результат: Пользователь noviy_user добавлен.</text:p>
      <text:p text:style-name="P142"/>
      <text:p text:style-name="P143">2. Удаление пользователя:</text:p>
      <text:p text:style-name="P144"><text:s text:c="3"/>remove_user('noviy_user')</text:p>
      <text:p text:style-name="P145"><text:s text:c="3"/>Результат: Пользователь noviy_user удален.</text:p>
      <text:p text:style-name="P146"/>
      <text:p text:style-name="P147"><text:span text:style-name="T148">3.<text:s/></text:span>Копирование<text:span text:style-name="T149"><text:s/></text:span>файла<text:span text:style-name="T150">:</text:span></text:p>
      <text:p text:style-name="P151"><text:s text:c="3"/>copy_file('source.txt', 'destination.txt')</text:p>
      <text:p text:style-name="P152"><text:span text:style-name="T153"><text:s text:c="3"/></text:span>Результат<text:span text:style-name="T154">:<text:s/></text:span>Файл<text:span text:style-name="T155"><text:s/>source.txt<text:s/></text:span>скопирован<text:span text:style-name="T156"><text:s/></text:span>в<text:span text:style-name="T157"><text:s/>destination.txt.</text:span></text:p>
      <text:p text:style-name="P158"/>
      <text:p text:style-name="P159"><text:span text:style-name="T160">4.<text:s/></text:span>Удаление<text:span text:style-name="T161"><text:s/></text:span>файла<text:span text:style-name="T162">:</text:span></text:p>
      <text:p text:style-name="P163"><text:s text:c="3"/>delete_file('src-dst/destination.txt')</text:p>
      <text:p text:style-name="P164"><text:span text:style-name="T165"><text:s text:c="3"/></text:span>Результат<text:span text:style-name="T166">:<text:s/></text:span>Файл<text:span text:style-name="T167"><text:s/>src-dst/destination.txt<text:s/></text:span>удален<text:span text:style-name="T168">.</text:span></text:p>
      <text:p text:style-name="P169"/>
      <text:p text:style-name="P170">5. Вывод списка процессов:</text:p>
      <text:p text:style-name="P171"><text:s text:c="3"/>list_processes()</text:p>
      <text:p text:style-name="P172"><text:s text:c="3"/>Результат: PID: 1, Имя: systemd / PID: 2, Имя: kthreadd / ... (множество процессов)</text:p>
      <text:p text:style-name="P173"/>
      <text:p text:style-name="P174">6. Мониторинг ресурсов:</text:p>
      <text:p text:style-name="P175"><text:s text:c="3"/>monitor_resources()</text:p>
      <text:p text:style-name="P176"><text:s text:c="3"/>Результат:</text:p>
      <text:p text:style-name="P177"><text:s text:c="3"/>CPU загружен на: 15.2%</text:p>
      <text:p text:style-name="P178"><text:s text:c="3"/>Памяти использовано: 42.5%</text:p>
      <text:p text:style-name="P179"><text:s text:c="3"/>Диск заполнен на: 38.0%</text:p>
      <text:p text:style-name="P180"><text:s text:c="3"/>-----------------------------</text:p>
      <text:p text:style-name="P181"><text:s text:c="3"/>(повторяется каждые 5 секунд)</text:p>
      <text:p text:style-name="P182"/>
      <text:p text:style-name="P183"><text:span text:style-name="T184">7.<text:s/></text:span>Резервное<text:span text:style-name="T185"><text:s/></text:span>копирование<text:span text:style-name="T186">:</text:span></text:p>
      <text:p text:style-name="P187"><text:s text:c="3"/>shutil.copytree('/home/user/data', '/home/user/backup/data')</text:p>
      <text:p text:style-name="P188"><text:span text:style-name="T189"><text:s text:c="3"/></text:span>Результат: Копирование завершено</text:p>
      <text:p text:style-name="P190"/>
      <text:soft-page-break/>
      <text:p text:style-name="P191">8. Изменение прав доступа:</text:p>
      <text:p text:style-name="P192"><text:s text:c="3"/><text:span text:style-name="T193">os.chmod('file.txt', 0o755)</text:span></text:p>
      <text:p text:style-name="P194"><text:span text:style-name="T195"><text:s text:c="3"/></text:span>Результат: Права доступа изменены</text:p>
      <text:p text:style-name="P196"/>
      <text:p text:style-name="P197">9. Запуск по расписанию:</text:p>
      <text:p text:style-name="P198"><text:s text:c="3"/><text:span text:style-name="T199">schedule.every().day.at("03:00").do(job)</text:span></text:p>
      <text:p text:style-name="P200"><text:span text:style-name="T201"><text:s text:c="3"/></text:span>Результат: Задача выполнена! (в 3:00)</text:p>
      <text:p text:style-name="P202"/>
      <text:p text:style-name="P203">Список использованной литературы и материалов</text:p>
      <text:p text:style-name="P204"/>
      <text:p text:style-name="P205">1. Иванова Г.С. Основы программирования: учебник для вузов. – 4-е изд., стер. – М: изд-во МГТУ им. Н.Э. Баумана, 2007. – 416 с.: ил.</text:p>
      <text:p text:style-name="P206">2. Лутц М. Изучаем Python. – 5-е изд. – М.: Диалектика, 2019. – 1460 с.: ил.</text:p>
      <text:p text:style-name="P207"><text:span text:style-name="T208">3. subprocess — Subprocess management. —<text:s/></text:span>Текст<text:span text:style-name="T209"><text:s/>:<text:s/></text:span>электронный<text:span text:style-name="T210"><text:s/>// Python Documentation : [</text:span>сайт<text:span text:style-name="T211">]. — URL: https://docs.python.org/3/library/subprocess.html</text:span></text:p>
      <text:p text:style-name="P212"><text:span text:style-name="T213">4. psutil documentation. —<text:s/></text:span>Текст<text:span text:style-name="T214"><text:s/>:<text:s/></text:span>электронный<text:span text:style-name="T215"><text:s/>// psutil : [</text:span>сайт<text:span text:style-name="T216">]. — URL: https://psutil.readthedocs.io/</text:span></text:p>
      <text:p text:style-name="P217"><text:span text:style-name="T218">5. schedule documentation. —<text:s/></text:span>Текст<text:span text:style-name="T219"><text:s/>:<text:s/></text:span>электронный<text:span text:style-name="T220"><text:s/>// schedule : [</text:span>сайт<text:span text:style-name="T221">]. — URL: https://schedule.readthedocs.io/</text:span></text:p>
      <text:p text:style-name="P222"><text:span text:style-name="T223">6. Welcome to python.org. —<text:s/></text:span>Текст<text:span text:style-name="T224"><text:s/>:<text:s/></text:span>электронный<text:span text:style-name="T225"><text:s/>// The official home of the Python Programming Language : [</text:span>сайт<text:span text:style-name="T226">]. — URL: https://www.python.org/</text:span></text:p>
      <text:p text:style-name="P227">7. Git. — Текст : электронный // Git : [сайт]. — URL: https://git-scm.com/</text:p>
      <text:p text:style-name="P228">8. GitHub. — Текст : электронный // GitHub : [сайт]. — URL: https://github.com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54" style:family="table-column">
      <style:table-column-properties style:column-width="1.7319in" style:use-optimal-column-width="false"/>
    </style:style>
    <style:style style:name="TableColumn55" style:family="table-column">
      <style:table-column-properties style:column-width="5.3541in" style:use-optimal-column-width="false"/>
    </style:style>
    <style:style style:name="Table53" style:family="table">
      <style:table-properties style:width="7.0861in" fo:margin-left="0in" table:align="left"/>
    </style:style>
    <style:style style:name="TableRow56" style:family="table-row">
      <style:table-row-properties style:min-row-height="2.0479in" style:use-optimal-row-height="false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/>
    <style:master-page style:next-style-name="MP0" style:name="MPF0" style:page-layout-name="PL0">
      <style:head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>
      <style:footer>
        <text:p text:style-name="Нижнийколонтитулпоцентру">МОСКВА<text:line-break/>2026</text:p>
      </style:footer>
    </style:master-page>
    <style:master-page style:name="MP1" style:page-layout-name="PL1">
      <style:header>
        <text:p text:style-name="Верхнийколонтитулпоцентру"><text:page-number text:fixed="false">6</text:page-number></text:p>
      </style:header>
    </style:master-page>
    <style:master-page style:next-style-name="MP1" style:name="MPF1" style:page-layout-name="PL1">
      <style:header>
        <table:table table:style-name="Table53">
          <table:table-columns>
            <table:table-column table:style-name="TableColumn54"/>
            <table:table-column table:style-name="TableColumn55"/>
          </table:table-columns>
          <table:table-row table:style-name="TableRow56">
            <table:table-cell table:style-name="TableCell57">
              <text:p text:style-name="TableContents"><draw:frame draw:style-name="a1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58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>
      <style:footer>
        <text:p text:style-name="Нижнийколонтитулпоцентру">МОСКВА<text:line-break/>202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y_default</dc:title>
    <dc:creator>k50311</dc:creator>
    <meta:creation-date>2025-09-15T11:13:00Z</meta:creation-date>
    <dc:date>2026-05-29T23:40:00Z</dc:date>
    <meta:template xlink:href="Normal.dotm" xlink:type="simple"/>
    <meta:editing-cycles>24</meta:editing-cycles>
    <meta:editing-duration>PT2160S</meta:editing-duration>
    <meta:document-statistic meta:page-count="7" meta:paragraph-count="12" meta:word-count="945" meta:character-count="6326" meta:row-count="44" meta:non-whitespace-character-count="5393"/>
  </office:meta>
</office:document-meta>
</file>