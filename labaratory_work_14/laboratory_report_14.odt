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5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P63" style:parent-style-name="Textbody" style:family="paragraph">
      <style:paragraph-properties fo:text-align="start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start"/>
    </style:style>
    <style:style style:name="P66" style:parent-style-name="Textbody" style:family="paragraph">
      <style:paragraph-properties fo:text-align="start"/>
    </style:style>
    <style:style style:name="P67" style:parent-style-name="Textbody" style:family="paragraph">
      <style:paragraph-properties fo:text-align="start"/>
    </style:style>
    <style:style style:name="P68" style:parent-style-name="Textbody" style:family="paragraph">
      <style:paragraph-properties fo:text-align="start"/>
    </style:style>
    <style:style style:name="P6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Textbody" style:family="paragraph">
      <style:paragraph-properties fo:text-align="start"/>
    </style:style>
    <style:style style:name="P72" style:parent-style-name="Textbody" style:family="paragraph">
      <style:paragraph-properties fo:text-align="start"/>
    </style:style>
    <style:style style:name="P73" style:parent-style-name="Textbody" style:family="paragraph">
      <style:paragraph-properties fo:text-align="start"/>
    </style:style>
    <style:style style:name="P74" style:parent-style-name="Textbody" style:family="paragraph">
      <style:paragraph-properties fo:text-align="start"/>
    </style:style>
    <style:style style:name="P75" style:parent-style-name="Textbody" style:family="paragraph">
      <style:paragraph-properties fo:text-align="start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P78" style:parent-style-name="Textbody" style:family="paragraph">
      <style:paragraph-properties fo:text-align="start"/>
    </style:style>
    <style:style style:name="P79" style:parent-style-name="Textbody" style:family="paragraph">
      <style:paragraph-properties fo:text-align="start"/>
    </style:style>
    <style:style style:name="P80" style:parent-style-name="Textbody" style:family="paragraph">
      <style:paragraph-properties fo:text-align="start"/>
    </style:style>
    <style:style style:name="P81" style:parent-style-name="Textbody" style:family="paragraph">
      <style:paragraph-properties fo:text-align="start"/>
    </style:style>
    <style:style style:name="P82" style:parent-style-name="Textbody" style:family="paragraph">
      <style:paragraph-properties fo:text-align="start"/>
    </style:style>
    <style:style style:name="P83" style:parent-style-name="Textbody" style:family="paragraph">
      <style:paragraph-properties fo:text-align="start"/>
    </style:style>
    <style:style style:name="P84" style:parent-style-name="Textbody" style:family="paragraph">
      <style:paragraph-properties fo:text-align="start"/>
    </style:style>
    <style:style style:name="P85" style:parent-style-name="Textbody" style:family="paragraph">
      <style:paragraph-properties fo:text-align="start"/>
    </style:style>
    <style:style style:name="P86" style:parent-style-name="Textbody" style:family="paragraph">
      <style:paragraph-properties fo:text-align="start"/>
    </style:style>
    <style:style style:name="P87" style:parent-style-name="Textbody" style:family="paragraph">
      <style:paragraph-properties fo:text-align="start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0" style:parent-style-name="Standard" style:family="paragraph">
      <style:paragraph-properties fo:line-height="150%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Standard" style:family="paragraph">
      <style:paragraph-properties fo:line-height="150%"/>
    </style:style>
    <style:style style:name="T93" style:parent-style-name="StrongEmphasis" style:family="text">
      <style:text-properties fo:font-weight="normal" style:font-weight-asian="normal" style:font-weight-complex="normal" fo:language="en" fo:country="US"/>
    </style:style>
    <style:style style:name="T94" style:parent-style-name="StrongEmphasis" style:family="text">
      <style:text-properties fo:font-weight="normal" style:font-weight-asian="normal" style:font-weight-complex="normal"/>
    </style:style>
    <style:style style:name="T95" style:parent-style-name="StrongEmphasis" style:family="text">
      <style:text-properties fo:font-weight="normal" style:font-weight-asian="normal" style:font-weight-complex="normal" fo:language="en" fo:country="US"/>
    </style:style>
    <style:style style:name="T96" style:parent-style-name="StrongEmphasis" style:family="text">
      <style:text-properties fo:font-weight="normal" style:font-weight-asian="normal" style:font-weight-complex="normal"/>
    </style:style>
    <style:style style:name="T97" style:parent-style-name="StrongEmphasis" style:family="text">
      <style:text-properties fo:font-weight="normal" style:font-weight-asian="normal" style:font-weight-complex="normal" fo:language="en" fo:country="US"/>
    </style:style>
    <style:style style:name="T98" style:parent-style-name="StrongEmphasis" style:family="text">
      <style:text-properties fo:font-weight="normal" style:font-weight-asian="normal" style:font-weight-complex="normal"/>
    </style:style>
    <style:style style:name="T99" style:parent-style-name="StrongEmphasis" style:family="text">
      <style:text-properties fo:font-weight="normal" style:font-weight-asian="normal" style:font-weight-complex="normal" fo:language="en" fo:country="US"/>
    </style:style>
    <style:style style:name="T100" style:parent-style-name="StrongEmphasis" style:family="text">
      <style:text-properties fo:font-weight="normal" style:font-weight-asian="normal" style:font-weight-complex="normal"/>
    </style:style>
    <style:style style:name="T101" style:parent-style-name="StrongEmphasis" style:family="text">
      <style:text-properties fo:font-weight="normal" style:font-weight-asian="normal" style:font-weight-complex="normal" fo:language="en" fo:country="US"/>
    </style:style>
    <style:style style:name="T102" style:parent-style-name="StrongEmphasis" style:family="text">
      <style:text-properties fo:font-weight="normal" style:font-weight-asian="normal" style:font-weight-complex="normal"/>
    </style:style>
    <style:style style:name="T103" style:parent-style-name="StrongEmphasis" style:family="text">
      <style:text-properties fo:font-weight="normal" style:font-weight-asian="normal" style:font-weight-complex="normal" fo:language="en" fo:country="US"/>
    </style:style>
    <style:style style:name="T104" style:parent-style-name="StrongEmphasis" style:family="text">
      <style:text-properties fo:font-weight="normal" style:font-weight-asian="normal" style:font-weight-complex="normal"/>
    </style:style>
    <style:style style:name="T105" style:parent-style-name="StrongEmphasis" style:family="text">
      <style:text-properties fo:font-weight="normal" style:font-weight-asian="normal" style:font-weight-complex="normal" fo:language="en" fo:country="US"/>
    </style:style>
    <style:style style:name="T106" style:parent-style-name="StrongEmphasis" style:family="text">
      <style:text-properties fo:font-weight="normal" style:font-weight-asian="normal" style:font-weight-complex="normal"/>
    </style:style>
    <style:style style:name="T107" style:parent-style-name="StrongEmphasis" style:family="text">
      <style:text-properties fo:font-weight="normal" style:font-weight-asian="normal" style:font-weight-complex="normal" fo:language="en" fo:country="US"/>
    </style:style>
    <style:style style:name="P108" style:parent-style-name="Textbody" style:family="paragraph">
      <style:paragraph-properties fo:text-align="start"/>
    </style:style>
    <style:style style:name="P10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Textbody" style:family="paragraph">
      <style:paragraph-properties fo:text-align="start"/>
    </style:style>
    <style:style style:name="P111" style:parent-style-name="Textbody" style:family="paragraph">
      <style:paragraph-properties fo:text-align="start"/>
    </style:style>
    <style:style style:name="P112" style:parent-style-name="Textbody" style:family="paragraph">
      <style:paragraph-properties fo:text-align="start"/>
    </style:style>
    <style:style style:name="P113" style:parent-style-name="Textbody" style:family="paragraph">
      <style:paragraph-properties fo:text-align="start"/>
    </style:style>
    <style:style style:name="P114" style:parent-style-name="Textbody" style:family="paragraph">
      <style:paragraph-properties fo:text-align="start"/>
    </style:style>
    <style:style style:name="P115" style:parent-style-name="Textbody" style:family="paragraph">
      <style:paragraph-properties fo:text-align="start"/>
    </style:style>
    <style:style style:name="P116" style:parent-style-name="Textbody" style:family="paragraph">
      <style:paragraph-properties fo:text-align="start"/>
    </style:style>
    <style:style style:name="P117" style:parent-style-name="Textbody" style:family="paragraph">
      <style:paragraph-properties fo:text-align="start"/>
    </style:style>
    <style:style style:name="P118" style:parent-style-name="Textbody" style:family="paragraph">
      <style:paragraph-properties fo:text-align="start"/>
    </style:style>
    <style:style style:name="P119" style:parent-style-name="Textbody" style:family="paragraph">
      <style:paragraph-properties fo:text-align="start"/>
    </style:style>
    <style:style style:name="P120" style:parent-style-name="Textbody" style:family="paragraph">
      <style:paragraph-properties fo:text-align="start"/>
    </style:style>
    <style:style style:name="P121" style:parent-style-name="Textbody" style:family="paragraph">
      <style:paragraph-properties fo:text-align="start"/>
    </style:style>
    <style:style style:name="P122" style:parent-style-name="Textbody" style:family="paragraph">
      <style:paragraph-properties fo:text-align="start"/>
    </style:style>
    <style:style style:name="P123" style:parent-style-name="Textbody" style:family="paragraph">
      <style:paragraph-properties fo:text-align="start"/>
    </style:style>
    <style:style style:name="P124" style:parent-style-name="Textbody" style:family="paragraph">
      <style:paragraph-properties fo:text-align="start"/>
    </style:style>
    <style:style style:name="P125" style:parent-style-name="Textbody" style:family="paragraph">
      <style:paragraph-properties fo:text-align="start"/>
    </style:style>
    <style:style style:name="P126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27" style:parent-style-name="Textbody" style:family="paragraph">
      <style:paragraph-properties fo:text-align="start"/>
    </style:style>
    <style:style style:name="P128" style:parent-style-name="Textbody" style:family="paragraph">
      <style:paragraph-properties fo:text-align="start"/>
    </style:style>
    <style:style style:name="P129" style:parent-style-name="Textbody" style:family="paragraph">
      <style:paragraph-properties fo:text-align="start"/>
    </style:style>
    <style:style style:name="P130" style:parent-style-name="Textbody" style:family="paragraph">
      <style:paragraph-properties fo:text-align="start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>
      <style:paragraph-properties fo:text-align="start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Textbody" style:family="paragraph">
      <style:paragraph-properties fo:text-align="start"/>
    </style:style>
    <style:style style:name="P145" style:parent-style-name="Textbody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4</text:p>
      <text:p text:style-name="Standard"/>
      <text:p text:style-name="Подзаголовок">Тема лабораторной работы: ООП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4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И. Р. Портузен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</text:a>2</text:p>
          <text:p text:style-name="Contents1"><text:a xlink:href="#__RefHeading___Toc1126_1594055144" office:target-frame-name="_top" xlink:show="replace">Листинг программы<text:tab/></text:a><text:a xlink:href="#__RefHeading___Toc1126_1594055144" office:target-frame-name="_top" xlink:show="replace">3</text:a></text:p>
          <text:p text:style-name="Contents1"><text:a xlink:href="#__RefHeading___Toc1128_1594055144" office:target-frame-name="_top" xlink:show="replace">Результат работы программы<text:tab/></text:a>3</text:p>
          <text:p text:style-name="Contents1"><text:a xlink:href="#__RefHeading___Toc1130_1594055144" office:target-frame-name="_top" xlink:show="replace">Список использованной литературы и материалов<text:tab/></text:a>4</text:p>
        </text:index-body>
      </text:table-of-content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9">Постановка задачи</text:p>
      <text:p text:style-name="P60"/>
      <text:p text:style-name="P61">Переписать программный код лабораторных работ №7 и №8 с использованием классов языка Python. Исходная функциональность программ должна быть полностью сохранена, изменению подлежит только структура кода — переход от процедурного стиля к объектно-ориентированному.</text:p>
      <text:p text:style-name="P62"/>
      <text:p text:style-name="P63">Исходные работы:</text:p>
      <text:p text:style-name="P64">- Лабораторная работа №7.1 — построение кусочно-заданной функции с использованием модуля turtle</text:p>
      <text:p text:style-name="P65">- Лабораторная работа №7.2 — построение точек методом Монте-Карло</text:p>
      <text:p text:style-name="Textbody">- Лабораторная работа №7.3 — построение графика функции<text:s/>ln((1+x)/(1-x))</text:p>
      <text:p text:style-name="P66">через ряд Тейлора</text:p>
      <text:p text:style-name="P67">- Лабораторная работа №8 — построение графиков двух функций (ряд Тейлора и<text:s/>arctg(x) + b) с графическим интерфейсом на Tkinter</text:p>
      <text:p text:style-name="P68"/>
      <text:p text:style-name="P69">Теоретическая часть</text:p>
      <text:p text:style-name="P70"/>
      <text:p text:style-name="P71">Объектно-ориентированное программирование (ООП) — это парадигма программирования, основанная на представлении программы в виде совокупности объектов, каждый из которых является экземпляром определенного класса. Классы описывают структуру и поведение объектов, объединяя данные (атрибуты) и методы (функции) для работы с этими данными.</text:p>
      <text:p text:style-name="P72"/>
      <text:soft-page-break/>
      <text:p text:style-name="P73">Основные принципы ООП:</text:p>
      <text:p text:style-name="P74">1. Инкапсуляция — сокрытие внутреннего состояния объекта и предоставление доступа к нему только через методы. Это позволяет защитить данные от некорректного использования.</text:p>
      <text:p text:style-name="P75">2. Наследование — механизм создания нового класса на основе существующего с добавлением или переопределением функциональности.</text:p>
      <text:p text:style-name="P76">3. Полиморфизм — возможность использования объектов разных классов через единый интерфейс.</text:p>
      <text:p text:style-name="P77">4. Абстракция — выделение существенных характеристик объекта, исключая незначительные детали.</text:p>
      <text:p text:style-name="P78"/>
      <text:p text:style-name="P79">Преимущества использования классов в Python:</text:p>
      <text:p text:style-name="P80">- Улучшенная организация кода: логически связанные функции и данные объединяются в одном месте</text:p>
      <text:p text:style-name="P81">- Возможность повторного использования кода через наследование</text:p>
      <text:p text:style-name="P82">- Упрощение отладки и тестирования: каждый класс можно тестировать отдельно</text:p>
      <text:p text:style-name="P83">- Инкапсуляция скрывает детали реализации, упрощая использование</text:p>
      <text:p text:style-name="P84">- Удобство работы в команде: классы представляют собой четкие модули</text:p>
      <text:p text:style-name="P85"/>
      <text:p text:style-name="P86">В данной работе процедурный код каждой лабораторной работы был преобразован в один или несколько классов. Все глобальные переменные стали атрибутами классов, а функции — методами. Логика работы программ осталась неизменной.</text:p>
      <text:p text:style-name="P87"/>
      <text:p text:style-name="P88">Листинг программы</text:p>
      <text:p text:style-name="P89"/>
      <text:p text:style-name="P90">Исходный код программы (листинг) размещен в репозитории<text:s/><text:span text:style-name="T91">GitHub</text:span></text:p>
      <text:p text:style-name="P92"><text:span text:style-name="T93">https</text:span><text:span text:style-name="T94">://</text:span><text:span text:style-name="T95">github</text:span><text:span text:style-name="T96">.</text:span><text:span text:style-name="T97">com</text:span><text:span text:style-name="T98">/</text:span><text:span text:style-name="T99">Ava</text:span><text:span text:style-name="T100">-</text:span><text:span text:style-name="T101">Khan</text:span><text:span text:style-name="T102">/</text:span><text:span text:style-name="T103">BMSTU</text:span><text:span text:style-name="T104">_</text:span><text:span text:style-name="T105">Python</text:span><text:span text:style-name="T106">_</text:span><text:span text:style-name="T107">PortuzenkovIR</text:span></text:p>
      <text:p text:style-name="P108"/>
      <text:p text:style-name="P109">Результат работы программы</text:p>
      <text:p text:style-name="P110"/>
      <text:soft-page-break/>
      <text:p text:style-name="P111">В результате выполнения работы все четыре программы были успешно переписаны с использованием классов. Программы сохранили полную функциональность исходных версий:</text:p>
      <text:p text:style-name="P112"/>
      <text:p text:style-name="P113">- Lab 7.1: Построение графика кусочно-заданной функции в заданной области</text:p>
      <text:p text:style-name="P114">- Lab 7.2: Отображение точек методом Монте-Карло с подсчетом площади фигуры</text:p>
      <text:p text:style-name="P115">- Lab 7.3: Построение графика ln(1-x) через ряд Тейлора с отображением области сходимости</text:p>
      <text:p text:style-name="P116">- Lab 8: Графическое приложение с возможностью изменения границ, шага меток и параметра смещения, отображением двух графиков разными цветами</text:p>
      <text:p text:style-name="P117"/>
      <text:p text:style-name="P118">Изменения в коде:</text:p>
      <text:p text:style-name="P119">- Все глобальные переменные заменены на атрибуты классов</text:p>
      <text:p text:style-name="P120">- Все функции заменены на методы классов</text:p>
      <text:p text:style-name="P121">- Добавлены конструкторы __init__ для инициализации атрибутов</text:p>
      <text:p text:style-name="P122">- Логика работы вынесена в метод run(), который запускает выполнение</text:p>
      <text:p text:style-name="P123">- Код стал более структурированным и удобным для дальнейшего расширения</text:p>
      <text:p text:style-name="P124"/>
      <text:p text:style-name="P125"/>
      <text:p text:style-name="P126">Список использованной литературы и материалов</text:p>
      <text:p text:style-name="P127"/>
      <text:p text:style-name="P128">1. Иванова Г.С. Основы программирования: учебник для вузов. – 4-е изд., стер. – М: изд-во МГТУ им. Н.Э. Баумана, 2007. – 416 с.: ил.</text:p>
      <text:p text:style-name="P129">2. Лутц М. Изучаем Python. – 5-е изд. – М.: Диалектика, 2019. – 1460 с.: ил.</text:p>
      <text:p text:style-name="P130">3. Брюс М. Ван Хорн II, Куан Нгуен. PyCharm: профессиональная работа на Python / пер. с англ. И<text:span text:style-name="T131">.</text:span>Л<text:span text:style-name="T132">.<text:s/></text:span>Люско<text:span text:style-name="T133">. –<text:s/></text:span>М<text:span text:style-name="T134">.:<text:s/></text:span>ДМК<text:span text:style-name="T135"><text:s/></text:span>Пресс<text:span text:style-name="T136">, 2024. – 618<text:s/></text:span>с<text:span text:style-name="T137">.:<text:s/></text:span>ил<text:span text:style-name="T138">.</text:span></text:p>
      <text:p text:style-name="P139"><text:span text:style-name="T140">4. Welcome to python.org. —<text:s/></text:span>Текст<text:span text:style-name="T141"><text:s/>:<text:s/></text:span>электронный<text:span text:style-name="T142"><text:s/>// The official home of the Python Programming Language : [</text:span>сайт<text:span text:style-name="T143">]. — URL: https://www.python.org/</text:span></text:p>
      <text:p text:style-name="P144">5. Git. — Текст : электронный // Git : [сайт]. — URL: https://git-scm.com/</text:p>
      <text:p text:style-name="P145">6. GitHub. — Текст : электронный // GitHub : [сайт]. — URL: https://github.com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5.3541in" style:use-optimal-column-width="false"/>
    </style:style>
    <style:style style:name="Table53" style:family="table">
      <style:table-properties style:width="7.0861in" fo:margin-left="0in" table:align="left"/>
    </style:style>
    <style:style style:name="TableRow56" style:family="table-row">
      <style:table-row-properties style:min-row-height="2.0479in" style:use-optimal-row-height="false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  <style:master-page style:name="MP1" style:page-layout-name="PL1">
      <style:header>
        <text:p text:style-name="Верхнийколонтитулпоцентру"><text:page-number text:fixed="false">4</text:page-number></text:p>
      </style:header>
    </style:master-page>
    <style:master-page style:next-style-name="MP1" style:name="MPF1" style:page-layout-name="PL1">
      <style:header>
        <table:table table:style-name="Table53">
          <table:table-columns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8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_default</dc:title>
    <dc:creator>k50311</dc:creator>
    <meta:creation-date>2025-09-15T11:13:00Z</meta:creation-date>
    <dc:date>2026-05-29T23:40:00Z</dc:date>
    <meta:template xlink:href="Normal.dotm" xlink:type="simple"/>
    <meta:editing-cycles>17</meta:editing-cycles>
    <meta:editing-duration>PT1320S</meta:editing-duration>
    <meta:document-statistic meta:page-count="5" meta:paragraph-count="9" meta:word-count="709" meta:character-count="4744" meta:row-count="33" meta:non-whitespace-character-count="4044"/>
  </office:meta>
</office:document-meta>
</file>